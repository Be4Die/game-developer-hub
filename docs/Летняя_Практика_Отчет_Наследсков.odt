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3000003F8C7C72039.png" manifest:media-type="image/png"/>
  <manifest:file-entry manifest:full-path="Pictures/10000001000001D50000042BAB76782B.png" manifest:media-type="image/png"/>
  <manifest:file-entry manifest:full-path="Pictures/1000000100000175000003FB4D5DA3E9.png" manifest:media-type="image/png"/>
  <manifest:file-entry manifest:full-path="Pictures/100000010000085E0000058C365BC112.png" manifest:media-type="image/png"/>
  <manifest:file-entry manifest:full-path="Pictures/10000001000003DE000004F71DD1E489.png" manifest:media-type="image/png"/>
  <manifest:file-entry manifest:full-path="Pictures/10000000000000FB000000FB8A11042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Devanagari3" svg:font-family="'Noto Sans Devanagari', Calibri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" svg:font-family="Ti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6.163cm" fo:margin-left="1.672cm" table:align="left" style:writing-mode="lr-tb"/>
    </style:style>
    <style:style style:name="Таблица1.A" style:family="table-column">
      <style:table-column-properties style:column-width="3.198cm"/>
    </style:style>
    <style:style style:name="Таблица1.B" style:family="table-column">
      <style:table-column-properties style:column-width="12.965cm"/>
    </style:style>
    <style:style style:name="Таблица1.1" style:family="table-row">
      <style:table-row-properties style:min-row-height="2.124cm" fo:keep-together="auto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2" style:family="table">
      <style:table-properties style:width="17.463cm" table:align="left" style:writing-mode="lr-tb"/>
    </style:style>
    <style:style style:name="Таблица2.A" style:family="table-column">
      <style:table-column-properties style:column-width="8.38cm"/>
    </style:style>
    <style:style style:name="Таблица2.B" style:family="table-column">
      <style:table-column-properties style:column-width="9.082cm"/>
    </style:style>
    <style:style style:name="Таблица2.1" style:family="table-row">
      <style:table-row-properties style:min-row-height="9.835cm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2" style:family="table-row">
      <style:table-row-properties style:min-row-height="2.475cm" fo:keep-together="auto"/>
    </style:style>
    <style:style style:name="Таблица2.3" style:family="table-row">
      <style:table-row-properties style:min-row-height="2.006cm" fo:keep-together="auto"/>
    </style:style>
    <style:style style:name="Таблица2.4" style:family="table-row">
      <style:table-row-properties style:min-row-height="1.884cm" fo:keep-together="auto"/>
    </style:style>
    <style:style style:name="Таблица2.A4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" style:family="table">
      <style:table-properties style:width="17.59cm" table:align="left" style:writing-mode="lr-tb"/>
    </style:style>
    <style:style style:name="Таблица3.A" style:family="table-column">
      <style:table-column-properties style:column-width="0.787cm"/>
    </style:style>
    <style:style style:name="Таблица3.B" style:family="table-column">
      <style:table-column-properties style:column-width="11.596cm"/>
    </style:style>
    <style:style style:name="Таблица3.C" style:family="table-column">
      <style:table-column-properties style:column-width="5.207cm"/>
    </style:style>
    <style:style style:name="Таблица3.1" style:family="table-row">
      <style:table-row-properties style:min-row-height="1.252cm" fo:keep-together="always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2" style:family="table-row">
      <style:table-row-properties fo:keep-together="auto"/>
    </style:style>
    <style:style style:name="Таблица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3" style:family="table-row">
      <style:table-row-properties fo:keep-together="auto"/>
    </style:style>
    <style:style style:name="Таблица3.4" style:family="table-row">
      <style:table-row-properties fo:keep-together="auto"/>
    </style:style>
    <style:style style:name="Таблица3.5" style:family="table-row">
      <style:table-row-properties fo:keep-together="auto"/>
    </style:style>
    <style:style style:name="Таблица3.6" style:family="table-row">
      <style:table-row-properties fo:keep-together="auto"/>
    </style:style>
    <style:style style:name="Таблица4" style:family="table">
      <style:table-properties style:width="17.463cm" table:align="left" style:writing-mode="lr-tb"/>
    </style:style>
    <style:style style:name="Таблица4.A" style:family="table-column">
      <style:table-column-properties style:column-width="4.001cm"/>
    </style:style>
    <style:style style:name="Таблица4.B" style:family="table-column">
      <style:table-column-properties style:column-width="13.46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A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5" style:family="table">
      <style:table-properties style:width="17.397cm" table:align="center" style:writing-mode="lr-tb"/>
    </style:style>
    <style:style style:name="Таблица5.A" style:family="table-column">
      <style:table-column-properties style:column-width="2.79cm"/>
    </style:style>
    <style:style style:name="Таблица5.B" style:family="table-column">
      <style:table-column-properties style:column-width="5.796cm"/>
    </style:style>
    <style:style style:name="Таблица5.C" style:family="table-column">
      <style:table-column-properties style:column-width="8.81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2" style:family="table-row">
      <style:table-row-properties style:min-row-height="1.139cm" fo:keep-together="auto"/>
    </style:style>
    <style:style style:name="Таблица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A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5.8" style:family="table-row">
      <style:table-row-properties style:min-row-height="0.861cm" fo:keep-together="auto"/>
    </style:style>
    <style:style style:name="Таблица5.11" style:family="table-row">
      <style:table-row-properties style:min-row-height="0.855cm" fo:keep-together="auto"/>
    </style:style>
    <style:style style:name="Таблица6" style:family="table">
      <style:table-properties style:width="17.487cm" table:align="left" style:writing-mode="lr-tb"/>
    </style:style>
    <style:style style:name="Таблица6.A" style:family="table-column">
      <style:table-column-properties style:column-width="0.827cm"/>
    </style:style>
    <style:style style:name="Таблица6.B" style:family="table-column">
      <style:table-column-properties style:column-width="4.367cm"/>
    </style:style>
    <style:style style:name="Таблица6.C" style:family="table-column">
      <style:table-column-properties style:column-width="2.79cm"/>
    </style:style>
    <style:style style:name="Таблица6.D" style:family="table-column">
      <style:table-column-properties style:column-width="2.406cm"/>
    </style:style>
    <style:style style:name="Таблица6.E" style:family="table-column">
      <style:table-column-properties style:column-width="2.212cm"/>
    </style:style>
    <style:style style:name="Таблица6.F" style:family="table-column">
      <style:table-column-properties style:column-width="2.194cm"/>
    </style:style>
    <style:style style:name="Таблица6.G" style:family="table-column">
      <style:table-column-properties style:column-width="2.69cm"/>
    </style:style>
    <style:style style:name="Таблица6.1" style:family="table-row">
      <style:table-row-properties style:min-row-height="0.746cm"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.E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2" style:family="table-row">
      <style:table-row-properties style:min-row-height="1.21cm" fo:keep-together="auto"/>
    </style:style>
    <style:style style:name="Таблица6.A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6.E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6.4" style:family="table-row">
      <style:table-row-properties style:min-row-height="1.302cm" fo:keep-together="auto"/>
    </style:style>
    <style:style style:name="Таблица6.5" style:family="table-row">
      <style:table-row-properties style:min-row-height="1.138cm" fo:keep-together="auto"/>
    </style:style>
    <style:style style:name="Таблица6.6" style:family="table-row">
      <style:table-row-properties style:min-row-height="1.236cm" fo:keep-together="auto"/>
    </style:style>
    <style:style style:name="Таблица6.7" style:family="table-row">
      <style:table-row-properties style:min-row-height="1.452cm" fo:keep-together="auto"/>
    </style:style>
    <style:style style:name="Таблица6.8" style:family="table-row">
      <style:table-row-properties style:min-row-height="1.834cm" fo:keep-together="auto"/>
    </style:style>
    <style:style style:name="P1" style:family="paragraph" style:parent-style-name="Table_20_Paragraph">
      <style:paragraph-properties fo:margin-left="0.088cm" fo:margin-right="0cm" style:snap-to-layout-grid="false"/>
      <style:text-properties style:font-name="Calibri" fo:font-size="10pt" fo:language="none" fo:country="none" style:font-size-asian="10pt" style:language-asian="none" style:country-asian="none" style:font-name-complex="Calibri"/>
    </style:style>
    <style:style style:name="P2" style:family="paragraph" style:parent-style-name="Standard">
      <style:paragraph-properties fo:margin-left="0.03cm" fo:margin-right="0cm" fo:text-align="center" style:justify-single-word="false" style:text-autospace="none"/>
      <style:text-properties fo:font-size="11pt" fo:font-style="italic" fo:font-weight="bold" style:font-size-asian="11pt" style:font-style-asian="italic" style:font-weight-asian="bold" style:font-weight-complex="bold"/>
    </style:style>
    <style:style style:name="P3" style:family="paragraph" style:parent-style-name="Standard">
      <style:paragraph-properties fo:margin-left="0.03cm" fo:margin-right="0cm" fo:text-align="center" style:justify-single-word="false" style:text-autospace="none"/>
      <style:text-properties fo:font-size="11pt" fo:font-style="italic" fo:font-weight="bold" style:font-size-asian="11pt" style:font-style-asian="italic" style:font-weight-asian="bold"/>
    </style:style>
    <style:style style:name="P4" style:family="paragraph" style:parent-style-name="Standard">
      <style:paragraph-properties fo:margin-left="0.03cm" fo:margin-right="0cm" fo:text-align="center" style:justify-single-word="false" style:text-autospace="none"/>
      <style:text-properties fo:font-size="6pt" fo:font-weight="bold" style:font-size-asian="6pt" style:font-weight-asian="bold" style:font-size-complex="6pt" style:font-weight-complex="bold"/>
    </style:style>
    <style:style style:name="P5" style:family="paragraph" style:parent-style-name="Table_20_Paragraph">
      <style:paragraph-properties fo:margin-left="0.855cm" fo:margin-right="0.021cm" fo:margin-top="0.002cm" fo:margin-bottom="0cm" style:contextual-spacing="false" fo:text-align="center" style:justify-single-word="false"/>
      <style:text-properties style:font-name="Calibri" fo:font-size="6pt" fo:font-style="italic" fo:font-weight="bold" style:font-size-asian="6pt" style:font-style-asian="italic" style:font-weight-asian="bold" style:font-name-complex="Calibri" style:font-size-complex="6pt"/>
    </style:style>
    <style:style style:name="P6" style:family="paragraph" style:parent-style-name="Standard">
      <style:text-properties text:display="none"/>
    </style:style>
    <style:style style:name="P7" style:family="paragraph" style:parent-style-name="Standard">
      <style:text-properties style:font-size-complex="12pt"/>
    </style:style>
    <style:style style:name="P8" style:family="paragraph" style:parent-style-name="Standard">
      <style:paragraph-properties fo:margin-top="1.27cm" fo:margin-bottom="0cm" style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 style:list-style-name="">
      <style:paragraph-properties fo:margin-left="0cm" fo:margin-right="0cm" fo:text-indent="0cm" style:auto-text-indent="false" style:snap-to-layout-grid="false"/>
      <style:text-properties fo:font-size="14pt" style:font-name-asian="Times New Roman" style:font-size-asian="14pt" style:language-asian="ru" style:country-asian="RU" style:font-size-complex="12pt"/>
    </style:style>
    <style:style style:name="P11" style:family="paragraph" style:parent-style-name="Standard">
      <style:paragraph-properties fo:line-height="100%"/>
      <style:text-properties style:font-size-complex="12pt"/>
    </style:style>
    <style:style style:name="P12" style:family="paragraph" style:parent-style-name="Standard">
      <style:paragraph-properties fo:line-height="100%"/>
      <style:text-properties style:text-underline-style="solid" style:text-underline-width="auto" style:text-underline-color="font-color" style:font-size-complex="12pt"/>
    </style:style>
    <style:style style:name="P13" style:family="paragraph" style:parent-style-name="Standard" style:list-style-name="">
      <style:paragraph-properties fo:margin-left="0cm" fo:margin-right="0cm" fo:text-indent="0cm" style:auto-text-indent="false" style:snap-to-layout-grid="false"/>
      <style:text-properties fo:font-size="9pt" style:font-name-asian="Times New Roman" style:font-size-asian="9pt" style:language-asian="ru" style:country-asian="RU" style:font-size-complex="9pt"/>
    </style:style>
    <style:style style:name="P14" style:family="paragraph" style:parent-style-name="Standard">
      <style:text-properties fo:font-size="9pt" style:font-name-asian="Times New Roman" style:font-size-asian="9pt" style:language-asian="ru" style:country-asian="RU" style:font-size-complex="12pt"/>
    </style:style>
    <style:style style:name="P15" style:family="paragraph" style:parent-style-name="Standard">
      <style:paragraph-properties fo:line-height="100%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4pt" style:font-name-asian="Times New Roman" style:font-size-asian="14pt" style:language-asian="ru" style:country-asian="RU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style:font-name-asian="Times New Roman" style:font-size-asian="14pt" style:language-asian="ru" style:country-asian="RU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Standard" style:master-page-name="Преобразование_20_1">
      <style:paragraph-properties fo:text-align="center" style:justify-single-word="false" style:page-number="auto"/>
      <style:text-properties fo:font-weight="bold" style:font-weight-asian="bold" style:font-size-complex="12pt"/>
    </style:style>
    <style:style style:name="P20" style:family="paragraph" style:parent-style-name="Standard">
      <style:text-properties fo:font-size="1pt" style:font-name-asian="Times New Roman" style:font-size-asian="1pt" style:language-asian="ru" style:country-asian="RU" style:font-size-complex="1pt"/>
    </style:style>
    <style:style style:name="P21" style:family="paragraph" style:parent-style-name="Standard">
      <style:paragraph-properties fo:text-align="left" style:justify-single-word="false"/>
    </style:style>
    <style:style style:name="P22" style:family="paragraph" style:parent-style-name="Standard">
      <style:paragraph-properties fo:margin-right="0cm" fo:text-indent="1.251cm" style:auto-text-indent="false"/>
      <style:text-properties fo:font-weight="bold" style:font-name-asian="Times New Roman" style:language-asian="ru" style:country-asian="RU" style:font-weight-asian="bold" style:font-size-complex="12pt"/>
    </style:style>
    <style:style style:name="P23" style:family="paragraph" style:parent-style-name="Standard">
      <style:text-properties fo:font-size="11pt" fo:font-weight="bold" style:font-name-asian="Times New Roman" style:font-size-asian="11pt" style:language-asian="ru" style:country-asian="RU" style:font-weight-asian="bold"/>
    </style:style>
    <style:style style:name="P24" style:family="paragraph" style:parent-style-name="Standard">
      <style:paragraph-properties fo:margin-top="0.212cm" fo:margin-bottom="0cm" style:contextual-spacing="false" fo:text-align="center" style:justify-single-word="false"/>
      <style:text-properties fo:color="#ff0000" loext:opacity="100%" fo:font-weight="bold" style:font-name-asian="Times New Roman" style:language-asian="ru" style:country-asian="RU" style:font-weight-asian="bold" style:font-size-complex="12pt"/>
    </style:style>
    <style:style style:name="P25" style:family="paragraph" style:parent-style-name="Standard">
      <style:paragraph-properties fo:margin-top="0.212cm" fo:margin-bottom="0cm" style:contextual-spacing="false" fo:text-align="center" style:justify-single-word="false"/>
      <style:text-properties fo:font-weight="bold" style:font-name-asian="Times New Roman" style:language-asian="ru" style:country-asian="RU" style:font-weight-asian="bold" style:font-size-complex="12pt"/>
    </style:style>
    <style:style style:name="P26" style:family="paragraph" style:parent-style-name="Standard">
      <style:paragraph-properties fo:margin-left="-0.101cm" fo:margin-right="-0.101cm" fo:line-height="100%" fo:text-align="center" style:justify-single-word="false"/>
      <style:text-properties fo:font-size="10pt" fo:font-weight="bold" style:font-name-asian="Times New Roman" style:font-size-asian="10pt" style:language-asian="ru" style:country-asian="RU" style:font-weight-asian="bold" style:font-size-complex="10pt"/>
    </style:style>
    <style:style style:name="P27" style:family="paragraph" style:parent-style-name="Standard">
      <style:paragraph-properties fo:margin-left="0.101cm" fo:margin-right="0.101cm" fo:line-height="80%" fo:text-align="center" style:justify-single-word="false"/>
      <style:text-properties fo:font-size="10pt" fo:font-weight="bold" style:font-name-asian="Times New Roman" style:font-size-asian="10pt" style:language-asian="ru" style:country-asian="RU" style:font-weight-asian="bold" style:font-size-complex="10pt"/>
    </style:style>
    <style:style style:name="P28" style:family="paragraph" style:parent-style-name="Standard">
      <style:paragraph-properties fo:line-height="100%" fo:text-align="center" style:justify-single-word="false"/>
      <style:text-properties fo:font-size="10pt" fo:font-weight="bold" style:font-name-asian="Times New Roman" style:font-size-asian="10pt" style:language-asian="ru" style:country-asian="RU" style:font-weight-asian="bold" style:font-size-complex="10pt"/>
    </style:style>
    <style:style style:name="P29" style:family="paragraph" style:parent-style-name="Standard">
      <style:paragraph-properties fo:line-height="100%"/>
      <style:text-properties fo:font-size="10pt" fo:font-weight="bold" style:font-name-asian="Times New Roman" style:font-size-asian="10pt" style:language-asian="ru" style:country-asian="RU" style:font-weight-asian="bold" style:font-size-complex="10pt"/>
    </style:style>
    <style:style style:name="P30" style:family="paragraph" style:parent-style-name="Standard">
      <style:paragraph-properties fo:line-height="100%"/>
      <style:text-properties fo:font-size="10pt" style:font-name-asian="Times New Roman" style:font-size-asian="10pt" style:language-asian="ru" style:country-asian="RU" style:font-size-complex="10pt"/>
    </style:style>
    <style:style style:name="P31" style:family="paragraph" style:parent-style-name="Standard">
      <style:paragraph-properties fo:line-height="100%" fo:text-align="left" style:justify-single-word="false"/>
      <style:text-properties fo:font-size="10pt" style:font-name-asian="Times New Roman" style:font-size-asian="10pt" style:language-asian="ru" style:country-asian="RU" style:font-size-complex="10pt"/>
    </style:style>
    <style:style style:name="P32" style:family="paragraph" style:parent-style-name="Standard">
      <style:paragraph-properties fo:line-height="100%" fo:text-align="left" style:justify-single-word="false"/>
      <style:text-properties fo:color="#000000" loext:opacity="100%" fo:font-size="10pt" style:font-name-asian="Times New Roman" style:font-size-asian="10pt" style:language-asian="ru" style:country-asian="RU" style:font-size-complex="10pt"/>
    </style:style>
    <style:style style:name="P33" style:family="paragraph" style:parent-style-name="Standard" style:list-style-name="WW8Num3">
      <style:paragraph-properties fo:margin-left="0.023cm" fo:margin-right="0cm" fo:line-height="100%" fo:text-indent="0cm" style:auto-text-indent="false"/>
      <style:text-properties fo:font-size="10pt" style:font-name-asian="Times New Roman" style:font-size-asian="10pt" style:language-asian="ru" style:country-asian="RU" style:font-size-complex="10pt"/>
    </style:style>
    <style:style style:name="P34" style:family="paragraph" style:parent-style-name="Standard">
      <style:paragraph-properties fo:line-height="100%" fo:text-align="center" style:justify-single-word="false" style:snap-to-layout-grid="false"/>
      <style:text-properties fo:font-size="10pt" fo:font-weight="bold" style:font-name-asian="Times New Roman" style:font-size-asian="10pt" style:language-asian="ru" style:country-asian="RU" style:font-weight-asian="bold" style:font-size-complex="10pt"/>
    </style:style>
    <style:style style:name="P35" style:family="paragraph" style:parent-style-name="Standard">
      <style:paragraph-properties fo:margin-top="0.635cm" fo:margin-bottom="0cm" style:contextual-spacing="false"/>
      <style:text-properties style:font-name-asian="Times New Roman" style:language-asian="ru" style:country-asian="RU" style:font-size-complex="12pt"/>
    </style:style>
    <style:style style:name="P36" style:family="paragraph" style:parent-style-name="Standard">
      <style:paragraph-properties fo:margin-top="0.635cm" fo:margin-bottom="0cm" style:contextual-spacing="false"/>
    </style:style>
    <style:style style:name="P37" style:family="paragraph" style:parent-style-name="Standard">
      <style:paragraph-properties fo:margin-top="0.212cm" fo:margin-bottom="0cm" style:contextual-spacing="false" fo:line-height="100%"/>
      <style:text-properties style:font-name-asian="Times New Roman" style:language-asian="ru" style:country-asian="RU" style:font-size-complex="12pt"/>
    </style:style>
    <style:style style:name="P38" style:family="paragraph" style:parent-style-name="Standard">
      <style:paragraph-properties fo:margin-left="4.501cm" fo:margin-right="0cm" fo:line-height="100%" fo:text-align="left" style:justify-single-word="false"/>
      <style:text-properties fo:font-size="8pt" fo:font-style="italic" style:font-name-asian="Times New Roman" style:font-size-asian="8pt" style:language-asian="ru" style:country-asian="RU" style:font-style-asian="italic" style:font-size-complex="8pt"/>
    </style:style>
    <style:style style:name="P39" style:family="paragraph" style:parent-style-name="Standard">
      <style:paragraph-properties fo:line-height="130%" fo:text-align="left" style:justify-single-word="false"/>
    </style:style>
    <style:style style:name="P40" style:family="paragraph" style:parent-style-name="Standard">
      <style:paragraph-properties fo:line-height="100%" fo:text-align="left" style:justify-single-word="false"/>
      <style:text-properties fo:font-style="italic" style:text-underline-style="solid" style:text-underline-width="auto" style:text-underline-color="font-color" style:font-name-asian="Times New Roman" style:language-asian="ru" style:country-asian="RU" style:font-style-asian="italic" style:font-size-complex="12pt"/>
    </style:style>
    <style:style style:name="P41" style:family="paragraph" style:parent-style-name="Standard">
      <style:paragraph-properties fo:line-height="100%" fo:text-align="left" style:justify-single-word="false"/>
      <style:text-properties style:font-name-asian="Times New Roman" style:language-asian="ru" style:country-asian="RU" style:font-size-complex="12pt"/>
    </style:style>
    <style:style style:name="P42" style:family="paragraph" style:parent-style-name="Standard">
      <style:paragraph-properties fo:margin-left="4.501cm" fo:margin-right="0cm" fo:line-height="100%"/>
      <style:text-properties fo:font-size="8pt" fo:font-style="italic" style:font-name-asian="Times New Roman" style:font-size-asian="8pt" style:language-asian="ru" style:country-asian="RU" style:font-style-asian="italic" style:font-size-complex="8pt"/>
    </style:style>
    <style:style style:name="P43" style:family="paragraph" style:parent-style-name="Standard">
      <style:text-properties fo:font-size="5pt" fo:font-style="italic" style:font-name-asian="Times New Roman" style:font-size-asian="5pt" style:language-asian="ru" style:country-asian="RU" style:font-style-asian="italic" style:font-size-complex="5pt"/>
    </style:style>
    <style:style style:name="P44" style:family="paragraph" style:parent-style-name="Standard">
      <style:paragraph-properties fo:text-align="center" style:justify-single-word="false" fo:break-before="page"/>
      <style:text-properties fo:font-weight="bold" style:font-weight-asian="bold" style:font-size-complex="12pt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style:font-name-asian="Times New Roman" style:language-asian="ru" style:country-asian="RU" style:font-size-complex="12pt" style:font-weight-complex="bold"/>
    </style:style>
    <style:style style:name="P46" style:family="paragraph" style:parent-style-name="Standard">
      <style:paragraph-properties fo:line-height="130%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fo:font-size="11pt" fo:font-weight="bold" style:font-name-asian="Times New Roman" style:font-size-asian="11pt" style:language-asian="ru" style:country-asian="RU" style:font-weight-asian="bold"/>
    </style:style>
    <style:style style:name="P48" style:family="paragraph" style:parent-style-name="Standard">
      <style:paragraph-properties style:snap-to-layout-grid="false"/>
      <style:text-properties fo:color="#000000" loext:opacity="100%" fo:font-size="11pt" style:font-name-asian="Times New Roman" style:font-size-asian="11pt" style:language-asian="ru" style:country-asian="RU"/>
    </style:style>
    <style:style style:name="P49" style:family="paragraph" style:parent-style-name="Standard">
      <style:paragraph-properties fo:line-height="100%"/>
      <style:text-properties fo:color="#000000" loext:opacity="100%" fo:font-size="11pt" style:font-size-asian="11pt"/>
    </style:style>
    <style:style style:name="P50" style:family="paragraph" style:parent-style-name="Standard">
      <style:paragraph-properties style:snap-to-layout-grid="false"/>
      <style:text-properties fo:color="#000000" loext:opacity="100%" fo:font-size="11pt" officeooo:paragraph-rsid="000f2305" style:font-name-asian="Times New Roman" style:font-size-asian="11pt" style:language-asian="ru" style:country-asian="RU"/>
    </style:style>
    <style:style style:name="P51" style:family="paragraph" style:parent-style-name="Абзац_20_списка">
      <style:paragraph-properties fo:margin-left="0cm" fo:margin-right="0cm" fo:margin-top="0cm" fo:margin-bottom="0cm" style:contextual-spacing="true" fo:line-height="150%" fo:text-indent="0cm" style:auto-text-indent="false"/>
      <style:text-properties fo:font-size="11pt" fo:language="ru" fo:country="RU" style:font-size-asian="11pt" style:font-size-complex="11pt"/>
    </style:style>
    <style:style style:name="P52" style:family="paragraph" style:parent-style-name="Абзац_20_списка">
      <style:paragraph-properties fo:margin-left="0cm" fo:margin-right="0cm" fo:margin-top="0cm" fo:margin-bottom="0cm" style:contextual-spacing="true" fo:line-height="150%" fo:text-indent="0cm" style:auto-text-indent="false"/>
      <style:text-properties fo:font-size="11pt" fo:language="ru" fo:country="RU" officeooo:rsid="000f2305" officeooo:paragraph-rsid="000f2305" style:font-size-asian="11pt" style:font-size-complex="11pt"/>
    </style:style>
    <style:style style:name="P53" style:family="paragraph" style:parent-style-name="Абзац_20_списка">
      <style:paragraph-properties fo:margin-left="0.053cm" fo:margin-right="0cm" fo:margin-top="0cm" fo:margin-bottom="0cm" style:contextual-spacing="true" fo:line-height="150%"/>
      <style:text-properties fo:font-size="11pt" fo:language="ru" fo:country="RU" style:font-size-asian="11pt" style:font-size-complex="11pt"/>
    </style:style>
    <style:style style:name="P54" style:family="paragraph" style:parent-style-name="Standard">
      <style:paragraph-properties fo:line-height="100%"/>
      <style:text-properties fo:font-size="11pt" style:font-size-asian="11pt"/>
    </style:style>
    <style:style style:name="P55" style:family="paragraph" style:parent-style-name="Standard">
      <style:paragraph-properties fo:line-height="100%" style:snap-to-layout-grid="false"/>
      <style:text-properties fo:color="#000000" loext:opacity="100%" fo:font-size="11pt" style:font-name-asian="Times New Roman" style:font-size-asian="11pt" style:language-asian="ru" style:country-asian="RU"/>
    </style:style>
    <style:style style:name="P56" style:family="paragraph" style:parent-style-name="Standard">
      <style:paragraph-properties fo:line-height="100%"/>
      <style:text-properties fo:color="#000000" loext:opacity="100%" style:font-name-asian="Times New Roman" style:language-asian="ru" style:country-asian="RU" style:font-size-complex="12pt"/>
    </style:style>
    <style:style style:name="P57" style:family="paragraph" style:parent-style-name="Standard">
      <style:paragraph-properties fo:line-height="100%"/>
      <style:text-properties fo:color="#000000" loext:opacity="100%" fo:font-size="10pt" fo:font-style="italic" style:font-name-asian="Times New Roman" style:font-size-asian="10pt" style:language-asian="ru" style:country-asian="RU" style:font-style-asian="italic" style:font-size-complex="12pt"/>
    </style:style>
    <style:style style:name="P58" style:family="paragraph" style:parent-style-name="Standard">
      <style:paragraph-properties fo:line-height="100%"/>
      <style:text-properties fo:color="#000000" loext:opacity="100%" style:text-underline-style="solid" style:text-underline-width="auto" style:text-underline-color="font-color" style:font-name-asian="Times New Roman" style:language-asian="ru" style:country-asian="RU" style:font-size-complex="12pt"/>
    </style:style>
    <style:style style:name="P59" style:family="paragraph" style:parent-style-name="Standard">
      <style:paragraph-properties fo:line-height="100%" fo:text-align="center" style:justify-single-word="false" fo:break-before="page"/>
      <style:text-properties fo:font-weight="bold" style:font-weight-asian="bold" style:font-size-complex="12pt"/>
    </style:style>
    <style:style style:name="P60" style:family="paragraph" style:parent-style-name="Standard">
      <style:paragraph-properties fo:margin-top="0cm" fo:margin-bottom="0.212cm" style:contextual-spacing="false" fo:line-height="130%">
        <style:tab-stops>
          <style:tab-stop style:position="1cm"/>
        </style:tab-stops>
      </style:paragraph-properties>
    </style:style>
    <style:style style:name="P61" style:family="paragraph" style:parent-style-name="Standard">
      <style:paragraph-properties fo:text-align="center" style:justify-single-word="false"/>
      <style:text-properties fo:color="#000000" loext:opacity="100%" fo:font-size="11pt" fo:font-weight="bold" style:font-size-asian="11pt" style:font-weight-asian="bold"/>
    </style:style>
    <style:style style:name="P62" style:family="paragraph" style:parent-style-name="Абзац_20_списка">
      <style:paragraph-properties fo:margin-left="0.053cm" fo:margin-right="0cm" fo:margin-top="0cm" fo:margin-bottom="0cm" style:contextual-spacing="true" fo:line-height="100%" style:snap-to-layout-grid="false"/>
      <style:text-properties fo:color="#000000" loext:opacity="100%" fo:font-size="11pt" fo:language="ru" fo:country="RU" style:font-size-asian="11pt" style:language-asian="ru" style:country-asian="RU" style:font-size-complex="11pt"/>
    </style:style>
    <style:style style:name="P63" style:family="paragraph" style:parent-style-name="Абзац_20_списка">
      <style:paragraph-properties fo:margin-left="0.053cm" fo:margin-right="0cm" fo:margin-top="0cm" fo:margin-bottom="0cm" style:contextual-spacing="true" fo:line-height="100%" style:snap-to-layout-grid="false"/>
      <style:text-properties fo:font-size="11pt" style:font-size-asian="11pt" style:font-size-complex="11pt"/>
    </style:style>
    <style:style style:name="P64" style:family="paragraph" style:parent-style-name="Standard">
      <style:paragraph-properties fo:line-height="100%" style:snap-to-layout-grid="false"/>
      <style:text-properties fo:color="#000000" loext:opacity="100%" fo:font-size="11pt" officeooo:paragraph-rsid="0010bc79" style:font-name-asian="Times New Roman" style:font-size-asian="11pt" style:language-asian="ru" style:country-asian="RU"/>
    </style:style>
    <style:style style:name="P65" style:family="paragraph" style:parent-style-name="Standard">
      <style:paragraph-properties fo:line-height="100%" fo:text-align="left" style:justify-single-word="false" style:snap-to-layout-grid="false"/>
      <style:text-properties fo:color="#000000" loext:opacity="100%" fo:font-size="11pt" style:font-name-asian="Times New Roman" style:font-size-asian="11pt" style:language-asian="ru" style:country-asian="RU"/>
    </style:style>
    <style:style style:name="P66" style:family="paragraph" style:parent-style-name="Standard">
      <style:paragraph-properties fo:margin-top="0.212cm" fo:margin-bottom="0cm" style:contextual-spacing="false" fo:line-height="100%"/>
      <style:text-properties fo:color="#000000" loext:opacity="100%" style:font-name-asian="Times New Roman" style:language-asian="ru" style:country-asian="RU" style:font-size-complex="12pt"/>
    </style:style>
    <style:style style:name="P67" style:family="paragraph" style:parent-style-name="Standard">
      <style:paragraph-properties fo:margin-top="0.212cm" fo:margin-bottom="0cm" style:contextual-spacing="false" fo:line-height="100%"/>
    </style:style>
    <style:style style:name="P68" style:family="paragraph" style:parent-style-name="Standard">
      <style:paragraph-properties fo:text-align="center" style:justify-single-word="false" fo:break-before="page"/>
      <style:text-properties fo:color="#000000" loext:opacity="100%" fo:font-weight="bold" style:font-name-asian="Times New Roman" style:language-asian="ru" style:country-asian="RU" style:font-weight-asian="bold" style:font-size-complex="12pt" style:font-weight-complex="bold"/>
    </style:style>
    <style:style style:name="P69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72" style:family="paragraph" style:parent-style-name="Standard">
      <style:paragraph-properties fo:line-height="100%" fo:text-align="left" style:justify-single-word="false" fo:orphans="2" fo:widows="2" fo:break-before="page"/>
      <style:text-properties fo:color="#000000" loext:opacity="100%" fo:font-weight="bold" style:font-weight-asian="bold" style:font-size-complex="12pt"/>
    </style:style>
    <style:style style:name="P73" style:family="paragraph" style:parent-style-name="Heading_20_1" style:list-style-name="">
      <style:paragraph-properties fo:margin-left="0cm" fo:margin-right="0cm" fo:text-indent="0cm" style:auto-text-indent="false"/>
      <style:text-properties style:font-name-complex="Times New Roman" style:font-size-complex="12pt"/>
    </style:style>
    <style:style style:name="P74" style:family="paragraph" style:parent-style-name="Standard">
      <style:paragraph-properties fo:margin-right="0cm" fo:margin-top="0cm" fo:margin-bottom="0cm" style:contextual-spacing="false" fo:text-indent="1.251cm" style:auto-text-indent="false">
        <style:tab-stops>
          <style:tab-stop style:position="-6.502cm"/>
          <style:tab-stop style:position="1.752cm"/>
        </style:tab-stops>
      </style:paragraph-properties>
      <style:text-properties style:font-size-complex="12pt"/>
    </style:style>
    <style:style style:name="P75" style:family="paragraph" style:parent-style-name="Text_20_body">
      <style:paragraph-properties fo:margin-right="0cm" fo:margin-top="0cm" fo:margin-bottom="0cm" style:contextual-spacing="false" fo:line-height="150%" fo:text-indent="1.251cm" style:auto-text-indent="false">
        <style:tab-stops>
          <style:tab-stop style:position="-6.502cm"/>
          <style:tab-stop style:position="1.752cm"/>
        </style:tab-stops>
      </style:paragraph-properties>
      <style:text-properties style:font-size-complex="12pt"/>
    </style:style>
    <style:style style:name="P76" style:family="paragraph" style:parent-style-name="Standard">
      <style:paragraph-properties fo:margin-right="0cm" fo:text-indent="1.251cm" style:auto-text-indent="false">
        <style:tab-stops>
          <style:tab-stop style:position="-6.502cm"/>
          <style:tab-stop style:position="1.752cm"/>
        </style:tab-stops>
      </style:paragraph-properties>
      <style:text-properties style:font-size-complex="12pt"/>
    </style:style>
    <style:style style:name="P77" style:family="paragraph" style:parent-style-name="Standard" style:list-style-name="WW8Num5">
      <style:paragraph-properties fo:margin-left="0cm" fo:margin-right="0cm" fo:text-indent="1.251cm" style:auto-text-indent="false">
        <style:tab-stops>
          <style:tab-stop style:position="-6.502cm"/>
          <style:tab-stop style:position="1.752cm"/>
        </style:tab-stops>
      </style:paragraph-properties>
      <style:text-properties style:font-size-complex="12pt"/>
    </style:style>
    <style:style style:name="P78" style:family="paragraph" style:parent-style-name="Standard">
      <style:paragraph-properties fo:margin-right="0cm" fo:text-indent="1.251cm" style:auto-text-indent="false">
        <style:tab-stops>
          <style:tab-stop style:position="-6.502cm"/>
          <style:tab-stop style:position="1.752cm"/>
        </style:tab-stops>
      </style:paragraph-properties>
    </style:style>
    <style:style style:name="P79" style:family="paragraph" style:parent-style-name="Standard" style:list-style-name="WW8Num11">
      <style:paragraph-properties fo:margin-left="0cm" fo:margin-right="0cm" fo:text-indent="1.251cm" style:auto-text-indent="false">
        <style:tab-stops>
          <style:tab-stop style:position="-6.502cm"/>
          <style:tab-stop style:position="1.752cm"/>
        </style:tab-stops>
      </style:paragraph-properties>
      <style:text-properties style:font-size-complex="12pt"/>
    </style:style>
    <style:style style:name="P80" style:family="paragraph" style:parent-style-name="Standard">
      <style:paragraph-properties fo:line-height="100%" fo:text-align="left" style:justify-single-word="false" fo:orphans="2" fo:widows="2" fo:break-before="page"/>
      <style:text-properties style:font-size-complex="12pt"/>
    </style:style>
    <style:style style:name="P81" style:family="paragraph" style:parent-style-name="Heading_20_1" style:list-style-name="WW8Num2">
      <style:paragraph-properties fo:margin-left="0cm" fo:margin-right="0cm" fo:text-indent="-0.64cm" style:auto-text-indent="false"/>
      <style:text-properties fo:text-transform="uppercase" style:font-name-complex="Times New Roman" style:font-size-complex="12pt"/>
    </style:style>
    <style:style style:name="P82" style:family="paragraph" style:parent-style-name="Heading_20_2" style:list-style-name="WW8Num4">
      <style:paragraph-properties fo:margin-left="0cm" fo:margin-right="0cm" fo:margin-top="0.42cm" fo:margin-bottom="0.42cm" style:contextual-spacing="false" fo:text-align="left" style:justify-single-word="false" fo:keep-together="always" fo:text-indent="0.499cm" style:auto-text-indent="false"/>
      <style:text-properties style:font-name-complex="Times New Roman" style:font-size-complex="12pt"/>
    </style:style>
    <style:style style:name="P83" style:family="paragraph" style:parent-style-name="Heading_20_3">
      <style:paragraph-properties fo:margin-left="0cm" fo:margin-right="0cm" fo:margin-top="0.21cm" fo:margin-bottom="0.21cm" style:contextual-spacing="false" fo:line-height="100%" fo:text-indent="0.75cm" style:auto-text-indent="false"/>
    </style:style>
    <style:style style:name="P84" style:family="paragraph" style:parent-style-name="Text_20_body">
      <style:paragraph-properties fo:margin-right="0cm" fo:margin-top="0cm" fo:margin-bottom="0cm" style:contextual-spacing="false" fo:line-height="150%" fo:text-indent="1.251cm" style:auto-text-indent="false">
        <style:tab-stops>
          <style:tab-stop style:position="-6.502cm"/>
          <style:tab-stop style:position="1.251cm"/>
        </style:tab-stops>
      </style:paragraph-properties>
      <style:text-properties fo:color="#000000" loext:opacity="100%" style:font-size-complex="12pt"/>
    </style:style>
    <style:style style:name="P85" style:family="paragraph" style:parent-style-name="Text_20_body">
      <style:paragraph-properties fo:margin-right="0cm" fo:margin-top="0cm" fo:margin-bottom="0cm" style:contextual-spacing="false" fo:line-height="150%" fo:text-align="center" style:justify-single-word="false" fo:text-indent="1.251cm" style:auto-text-indent="false">
        <style:tab-stops>
          <style:tab-stop style:position="-6.502cm"/>
          <style:tab-stop style:position="1.251cm"/>
        </style:tab-stops>
      </style:paragraph-properties>
    </style:style>
    <style:style style:name="P86" style:family="paragraph" style:parent-style-name="Text_20_body">
      <style:paragraph-properties fo:margin-right="0cm" fo:margin-top="0cm" fo:margin-bottom="0cm" style:contextual-spacing="false" fo:line-height="150%" fo:text-align="center" style:justify-single-word="false" fo:text-indent="1.251cm" style:auto-text-indent="false">
        <style:tab-stops>
          <style:tab-stop style:position="-6.502cm"/>
          <style:tab-stop style:position="1.251cm"/>
        </style:tab-stops>
      </style:paragraph-properties>
      <style:text-properties fo:color="#000000" loext:opacity="100%" fo:font-size="11pt" style:font-size-asian="11pt"/>
    </style:style>
    <style:style style:name="P87" style:family="paragraph" style:parent-style-name="Standard">
      <style:paragraph-properties fo:margin-right="0cm" fo:text-indent="1.251cm" style:auto-text-indent="false"/>
      <style:text-properties style:font-size-complex="12pt"/>
    </style:style>
    <style:style style:name="P88" style:family="paragraph" style:parent-style-name="Standard" style:list-style-name="WW8Num6">
      <style:paragraph-properties fo:margin-left="0cm" fo:margin-right="0cm" fo:text-indent="1.251cm" style:auto-text-indent="false"/>
      <style:text-properties style:font-size-complex="12pt"/>
    </style:style>
    <style:style style:name="P89" style:family="paragraph" style:parent-style-name="Text_20_body">
      <style:paragraph-properties fo:margin-right="0cm" fo:margin-top="0cm" fo:margin-bottom="0cm" style:contextual-spacing="false" fo:line-height="150%" fo:text-indent="1.251cm" style:auto-text-indent="false"/>
      <style:text-properties style:font-size-complex="12pt"/>
    </style:style>
    <style:style style:name="P90" style:family="paragraph" style:parent-style-name="Standard" style:list-style-name="WW8Num7">
      <style:paragraph-properties fo:margin-left="0cm" fo:margin-right="0cm" fo:text-indent="1.251cm" style:auto-text-indent="false"/>
      <style:text-properties style:font-size-complex="12pt"/>
    </style:style>
    <style:style style:name="P91" style:family="paragraph" style:parent-style-name="Standard" style:list-style-name="WW8Num12">
      <style:paragraph-properties fo:margin-left="0cm" fo:margin-right="0cm" fo:text-indent="1.251cm" style:auto-text-indent="false"/>
      <style:text-properties style:font-size-complex="12pt"/>
    </style:style>
    <style:style style:name="P92" style:family="paragraph" style:parent-style-name="Standard" style:list-style-name="WW8Num8">
      <style:paragraph-properties fo:margin-left="0cm" fo:margin-right="0cm" fo:text-indent="1.251cm" style:auto-text-indent="false">
        <style:tab-stops>
          <style:tab-stop style:position="1.298cm"/>
        </style:tab-stops>
      </style:paragraph-properties>
      <style:text-properties style:font-size-complex="12pt"/>
    </style:style>
    <style:style style:name="P93" style:family="paragraph" style:parent-style-name="Standard">
      <style:paragraph-properties fo:margin-right="0cm" fo:text-indent="1.251cm" style:auto-text-indent="false"/>
    </style:style>
    <style:style style:name="P94" style:family="paragraph" style:parent-style-name="Heading_20_2" style:list-style-name="WW8Num4">
      <style:paragraph-properties fo:margin-top="0.42cm" fo:margin-bottom="0.42cm" style:contextual-spacing="false" fo:line-height="100%" fo:text-align="left" style:justify-single-word="false" fo:keep-together="always"/>
      <style:text-properties style:font-name-complex="Times New Roman" style:font-size-complex="12pt"/>
    </style:style>
    <style:style style:name="P95" style:family="paragraph" style:parent-style-name="Standard">
      <style:paragraph-properties fo:margin-right="0cm" fo:text-align="left" style:justify-single-word="false" fo:orphans="2" fo:widows="2" fo:text-indent="1.251cm" style:auto-text-indent="false"/>
    </style:style>
    <style:style style:name="P96" style:family="paragraph" style:parent-style-name="Standard">
      <style:paragraph-properties fo:text-align="left" style:justify-single-word="false" fo:orphans="2" fo:widows="2"/>
      <style:text-properties fo:color="#000000" loext:opacity="100%" fo:font-weight="bold" style:font-weight-asian="bold" style:font-size-complex="12pt" style:font-weight-complex="bold"/>
    </style:style>
    <style:style style:name="P97" style:family="paragraph" style:parent-style-name="Standard">
      <style:paragraph-properties fo:text-align="center" style:justify-single-word="false"/>
      <style:text-properties fo:color="#000000" loext:opacity="100%" fo:font-weight="bold" style:font-weight-asian="bold" style:font-size-complex="12pt"/>
    </style:style>
    <style:style style:name="P98" style:family="paragraph" style:parent-style-name="Standard">
      <style:text-properties fo:color="#000000" loext:opacity="100%" style:font-size-complex="12pt"/>
    </style:style>
    <style:style style:name="P99" style:family="paragraph" style:parent-style-name="Standard">
      <style:text-properties fo:language="en" fo:country="US" style:font-size-complex="12pt"/>
    </style:style>
    <style:style style:name="P100" style:family="paragraph" style:parent-style-name="Standard">
      <loext:graphic-properties draw:fill="none" draw:fill-color="#ffffff"/>
      <style:paragraph-properties fo:background-color="transparent"/>
      <style:text-properties fo:color="#000000" loext:opacity="100%" fo:background-color="transparent" style:font-size-complex="12pt"/>
    </style:style>
    <style:style style:name="P101" style:family="paragraph" style:parent-style-name="Standard">
      <loext:graphic-properties draw:fill="none" draw:fill-color="#ffffff"/>
      <style:paragraph-properties fo:background-color="transparent"/>
      <style:text-properties fo:background-color="transparent" style:font-size-complex="12pt"/>
    </style:style>
    <style:style style:name="P102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color="#000000" loext:opacity="100%" fo:font-weight="bold" fo:background-color="transparent" style:font-weight-asian="bold" style:font-size-complex="12pt"/>
    </style:style>
    <style:style style:name="P103" style:family="paragraph" style:parent-style-name="Standard">
      <loext:graphic-properties draw:fill="none" draw:fill-color="#ffffff"/>
      <style:paragraph-properties fo:background-color="transparent"/>
      <style:text-properties fo:language="en" fo:country="US" fo:background-color="transparent" style:font-size-complex="12pt"/>
    </style:style>
    <style:style style:name="P104" style:family="paragraph" style:parent-style-name="Standard">
      <style:paragraph-properties fo:margin-right="0cm" fo:margin-top="0.212cm" fo:margin-bottom="0cm" style:contextual-spacing="false" fo:text-indent="1.251cm" style:auto-text-indent="false"/>
    </style:style>
    <style:style style:name="P105" style:family="paragraph" style:parent-style-name="Heading_20_2" style:list-style-name="WW8Num4">
      <style:paragraph-properties fo:margin-top="0.42cm" fo:margin-bottom="0.42cm" style:contextual-spacing="false" fo:line-height="100%" fo:text-align="left" style:justify-single-word="false" fo:keep-together="always"/>
    </style:style>
    <style:style style:name="P106" style:family="paragraph" style:parent-style-name="Standard">
      <style:paragraph-properties fo:margin-right="0cm" fo:text-indent="1.501cm" style:auto-text-indent="false"/>
      <style:text-properties style:font-size-complex="12pt"/>
    </style:style>
    <style:style style:name="P107" style:family="paragraph" style:parent-style-name="Standard" style:list-style-name="WW8Num10">
      <style:paragraph-properties fo:margin-left="0cm" fo:margin-right="0cm" fo:text-indent="1.251cm" style:auto-text-indent="false"/>
      <style:text-properties style:font-size-complex="12pt"/>
    </style:style>
    <style:style style:name="P108" style:family="paragraph" style:parent-style-name="Heading_20_1" style:list-style-name="">
      <style:paragraph-properties fo:margin-left="1.27cm" fo:margin-right="0cm" fo:margin-top="0.64cm" fo:margin-bottom="0.64cm" style:contextual-spacing="false" fo:text-indent="0cm" style:auto-text-indent="false" fo:break-before="page"/>
      <style:text-properties style:font-name-complex="Times New Roman" style:font-size-complex="12pt"/>
    </style:style>
    <style:style style:name="P109" style:family="paragraph" style:parent-style-name="Heading_20_1" style:list-style-name="">
      <style:paragraph-properties fo:margin-left="0cm" fo:margin-right="0cm" fo:margin-top="0.64cm" fo:margin-bottom="0.64cm" style:contextual-spacing="false" fo:text-indent="0cm" style:auto-text-indent="false" fo:break-before="page"/>
      <style:text-properties fo:color="#000000" loext:opacity="100%" style:font-name-complex="Times New Roman" style:font-size-complex="12pt"/>
    </style:style>
    <style:style style:name="P110" style:family="paragraph" style:parent-style-name="Standard" style:list-style-name="WW8Num9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11" style:family="paragraph" style:parent-style-name="Text_20_body" style:list-style-name="WW8Num9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12" style:family="paragraph" style:parent-style-name="Text_20_body">
      <style:paragraph-properties fo:margin-right="0cm" fo:margin-top="0cm" fo:margin-bottom="0cm" style:contextual-spacing="false" fo:line-height="150%" fo:text-indent="1.251cm" style:auto-text-indent="false"/>
    </style:style>
    <style:style style:name="P113" style:family="paragraph" style:parent-style-name="Heading_20_1" style:list-style-name="">
      <style:paragraph-properties fo:margin-left="0.63cm" fo:margin-right="0cm" fo:text-align="right" style:justify-single-word="false" fo:text-indent="0cm" style:auto-text-indent="false" fo:break-before="page"/>
      <style:text-properties fo:text-transform="uppercase" style:font-name-complex="Times New Roman" style:font-size-complex="12pt"/>
    </style:style>
    <style:style style:name="P11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5" style:family="paragraph" style:parent-style-name="Text_20_body">
      <style:paragraph-properties fo:margin-top="0cm" fo:margin-bottom="0cm" style:contextual-spacing="false" fo:line-height="150%" fo:text-align="center" style:justify-single-word="false">
        <style:tab-stops>
          <style:tab-stop style:position="-6.502cm"/>
          <style:tab-stop style:position="1.251cm"/>
        </style:tab-stops>
      </style:paragraph-properties>
      <style:text-properties fo:language="none" fo:country="none" style:language-asian="none" style:country-asian="none"/>
    </style:style>
    <style:style style:name="P116" style:family="paragraph" style:parent-style-name="Text_20_body">
      <style:paragraph-properties fo:margin-top="0cm" fo:margin-bottom="0cm" style:contextual-spacing="false" fo:line-height="150%" fo:text-align="center" style:justify-single-word="false">
        <style:tab-stops>
          <style:tab-stop style:position="-6.502cm"/>
          <style:tab-stop style:position="1.251cm"/>
        </style:tab-stops>
      </style:paragraph-properties>
      <style:text-properties fo:color="#000000" loext:opacity="100%" fo:font-size="11pt" style:font-size-asian="11pt"/>
    </style:style>
    <style:style style:name="P117" style:family="paragraph" style:parent-style-name="Standard">
      <style:paragraph-properties fo:margin-top="0cm" fo:margin-bottom="0.499cm" style:contextual-spacing="false"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ize="11pt" fo:font-style="italic" fo:font-weight="bold" style:font-size-asian="11pt" style:font-style-asian="italic" style:font-weight-asian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style:font-name="Calibri" fo:font-size="6pt" fo:font-style="italic" fo:font-weight="bold" style:font-size-asian="6pt" style:font-style-asian="italic" style:font-weight-asian="bold" style:font-name-complex="Calibri" style:font-size-complex="6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loext:opacity="100%" style:text-underline-style="solid" style:text-underline-width="auto" style:text-underline-color="font-color" style:font-name-asian="Times New Roman" style:language-asian="ru" style:country-asian="RU" style:font-size-complex="12pt" style:font-weight-complex="bold"/>
    </style:style>
    <style:style style:name="T6" style:family="text">
      <style:text-properties fo:color="#000000" loext:opacity="100%" style:font-name-asian="Times New Roman" style:language-asian="ru" style:country-asian="RU" style:font-size-complex="12pt" style:font-weight-complex="bold"/>
    </style:style>
    <style:style style:name="T7" style:family="text">
      <style:text-properties style:text-underline-style="solid" style:text-underline-width="auto" style:text-underline-color="font-color" style:font-size-complex="12pt"/>
    </style:style>
    <style:style style:name="T8" style:family="text">
      <style:text-properties style:font-size-complex="12pt" style:font-weight-complex="bold"/>
    </style:style>
    <style:style style:name="T9" style:family="text">
      <style:text-properties style:font-name="Calibri" fo:font-weight="bold" style:font-name-asian="Times New Roman" style:language-asian="ru" style:country-asian="RU" style:font-weight-asian="bold" style:font-name-complex="Calibri" style:font-size-complex="12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style:font-size-complex="12pt"/>
    </style:style>
    <style:style style:name="T12" style:family="text">
      <style:text-properties style:use-window-font-color="true" loext:opacity="0%" style:text-underline-style="solid" style:text-underline-width="auto" style:text-underline-color="font-color" officeooo:rsid="000d575b" fo:background-color="transparent" loext:char-shading-value="0" style:font-size-complex="12pt"/>
    </style:style>
    <style:style style:name="T13" style:family="text">
      <style:text-properties fo:color="#000000" loext:opacity="100%" fo:font-style="italic" style:text-underline-style="solid" style:text-underline-width="auto" style:text-underline-color="font-color" fo:font-weight="bold" style:font-style-asian="italic" style:font-weight-asian="bold" style:font-size-complex="12pt"/>
    </style:style>
    <style:style style:name="T14" style:family="text">
      <style:text-properties style:text-underline-style="solid" style:text-underline-width="auto" style:text-underline-color="font-color" style:font-name-asian="Times New Roman" style:language-asian="ru" style:country-asian="RU" style:font-size-complex="12pt" style:font-style-complex="italic"/>
    </style:style>
    <style:style style:name="T15" style:family="text">
      <style:text-properties fo:font-weight="bold" style:font-weight-asian="bold" style:font-size-complex="12pt"/>
    </style:style>
    <style:style style:name="T16" style:family="text">
      <style:text-properties style:text-underline-style="solid" style:text-underline-width="auto" style:text-underline-color="font-color" fo:background-color="transparent" loext:char-shading-value="0"/>
    </style:style>
    <style:style style:name="T17" style:family="text">
      <style:text-properties fo:font-weight="bold" style:font-name-asian="Times New Roman" style:language-asian="ru" style:country-asian="RU" style:font-weight-asian="bold" style:font-size-complex="12pt"/>
    </style:style>
    <style:style style:name="T18" style:family="text">
      <style:text-properties style:font-name-asian="Times New Roman" style:language-asian="ru" style:country-asian="RU" style:font-size-complex="12pt"/>
    </style:style>
    <style:style style:name="T19" style:family="text">
      <style:text-properties fo:language="en" fo:country="US" style:font-name-asian="Times New Roman" style:language-asian="ru" style:country-asian="RU" style:font-size-complex="12pt"/>
    </style:style>
    <style:style style:name="T20" style:family="text">
      <style:text-properties fo:font-style="italic" style:text-underline-style="solid" style:text-underline-width="auto" style:text-underline-color="font-color" style:font-style-asian="italic" style:font-size-complex="12pt"/>
    </style:style>
    <style:style style:name="T21" style:family="text">
      <style:text-properties fo:color="#000000" loext:opacity="100%" fo:font-weight="bold" style:font-name-asian="Times New Roman" style:language-asian="ru" style:country-asian="RU" style:font-weight-asian="bold" style:font-size-complex="12pt" style:font-weight-complex="bold"/>
    </style:style>
    <style:style style:name="T22" style:family="text">
      <style:text-properties fo:color="#000000" loext:opacity="100%" fo:language="en" fo:country="US" style:font-name-asian="Times New Roman" style:language-asian="ru" style:country-asian="RU" style:font-size-complex="12pt" style:font-weight-complex="bold"/>
    </style:style>
    <style:style style:name="T23" style:family="text">
      <style:text-properties fo:font-size="11pt" fo:font-weight="bold" style:font-name-asian="Times New Roman" style:font-size-asian="11pt" style:language-asian="ru" style:country-asian="RU" style:font-weight-asian="bold"/>
    </style:style>
    <style:style style:name="T24" style:family="text">
      <style:text-properties fo:color="#ff0000" loext:opacity="100%" fo:font-weight="bold" style:font-name-asian="Times New Roman" style:language-asian="ru" style:country-asian="RU" style:font-weight-asian="bold" style:font-size-complex="12pt"/>
    </style:style>
    <style:style style:name="T25" style:family="text">
      <style:text-properties fo:font-size="10pt" fo:font-weight="bold" style:font-name-asian="Times New Roman" style:font-size-asian="10pt" style:language-asian="ru" style:country-asian="RU" style:font-weight-asian="bold" style:font-size-complex="10pt"/>
    </style:style>
    <style:style style:name="T26" style:family="text">
      <style:text-properties fo:font-size="10pt" style:font-name-asian="Times New Roman" style:font-size-asian="10pt" style:language-asian="ru" style:country-asian="RU" style:font-size-complex="10pt"/>
    </style:style>
    <style:style style:name="T27" style:family="text">
      <style:text-properties fo:font-style="italic" style:text-underline-style="solid" style:text-underline-width="auto" style:text-underline-color="font-color" style:font-name-asian="Times New Roman" style:language-asian="ru" style:country-asian="RU" style:font-style-asian="italic" style:font-size-complex="12pt"/>
    </style:style>
    <style:style style:name="T28" style:family="text">
      <style:text-properties fo:font-size="8pt" fo:font-style="italic" style:font-name-asian="Times New Roman" style:font-size-asian="8pt" style:language-asian="ru" style:country-asian="RU" style:font-style-asian="italic" style:font-size-complex="8pt"/>
    </style:style>
    <style:style style:name="T29" style:family="text">
      <style:text-properties style:text-underline-style="solid" style:text-underline-width="auto" style:text-underline-color="font-color" style:font-name-asian="Times New Roman" style:language-asian="ru" style:country-asian="RU" style:font-size-complex="12pt"/>
    </style:style>
    <style:style style:name="T30" style:family="text">
      <style:text-properties fo:font-size="5pt" fo:font-style="italic" style:font-name-asian="Times New Roman" style:font-size-asian="5pt" style:language-asian="ru" style:country-asian="RU" style:font-style-asian="italic" style:font-size-complex="5pt"/>
    </style:style>
    <style:style style:name="T31" style:family="text">
      <style:text-properties fo:color="#000000" loext:opacity="100%" fo:font-weight="bold" style:font-name-asian="Times New Roman" style:language-asian="ru" style:country-asian="RU" style:font-weight-asian="bold" style:font-size-complex="12pt"/>
    </style:style>
    <style:style style:name="T32" style:family="text">
      <style:text-properties fo:color="#000000" loext:opacity="100%" style:font-name-asian="Times New Roman" style:language-asian="ru" style:country-asian="RU" style:font-size-complex="12pt"/>
    </style:style>
    <style:style style:name="T33" style:family="text">
      <style:text-properties fo:color="#000000" loext:opacity="100%" style:text-underline-style="solid" style:text-underline-width="auto" style:text-underline-color="font-color" style:font-name-asian="Times New Roman" style:language-asian="ru" style:country-asian="RU" style:font-size-complex="12pt"/>
    </style:style>
    <style:style style:name="T34" style:family="text">
      <style:text-properties fo:color="#000000" loext:opacity="100%" fo:font-style="italic" style:text-underline-style="solid" style:text-underline-width="auto" style:text-underline-color="font-color" style:font-name-asian="Times New Roman" style:language-asian="ru" style:country-asian="RU" style:font-style-asian="italic" style:font-size-complex="12pt"/>
    </style:style>
    <style:style style:name="T35" style:family="text">
      <style:text-properties fo:color="#000000" loext:opacity="100%" style:text-underline-style="solid" style:text-underline-width="auto" style:text-underline-color="font-color" officeooo:rsid="0010bc79" style:font-name-asian="Times New Roman" style:language-asian="ru" style:country-asian="RU" style:font-size-complex="12pt"/>
    </style:style>
    <style:style style:name="T36" style:family="text">
      <style:text-properties officeooo:rsid="000f2305"/>
    </style:style>
    <style:style style:name="T37" style:family="text">
      <style:text-properties fo:color="#000000" loext:opacity="100%" fo:font-style="italic" style:font-name-asian="Times New Roman" style:language-asian="ru" style:country-asian="RU" style:font-style-asian="italic" style:font-size-complex="12pt"/>
    </style:style>
    <style:style style:name="T38" style:family="text">
      <style:text-properties fo:font-size="10pt" fo:font-style="italic" style:font-name-asian="Times New Roman" style:font-size-asian="10pt" style:language-asian="ru" style:country-asian="RU" style:font-style-asian="italic" style:font-size-complex="10pt"/>
    </style:style>
    <style:style style:name="T39" style:family="text">
      <style:text-properties fo:color="#000000" loext:opacity="100%" fo:font-size="10pt" fo:font-style="italic" style:font-name-asian="Times New Roman" style:font-size-asian="10pt" style:language-asian="ru" style:country-asian="RU" style:font-style-asian="italic" style:font-size-complex="12pt"/>
    </style:style>
    <style:style style:name="T40" style:family="text">
      <style:text-properties fo:font-style="italic" style:font-name-asian="Times New Roman" style:language-asian="ru" style:country-asian="RU" style:font-style-asian="italic" style:font-size-complex="12pt"/>
    </style:style>
    <style:style style:name="T41" style:family="text">
      <style:text-properties fo:color="#000000" loext:opacity="100%" fo:font-style="italic" style:text-underline-style="solid" style:text-underline-width="auto" style:text-underline-color="font-color" style:font-name-asian="Times New Roman" style:language-asian="ru" style:country-asian="RU" style:font-style-asian="italic" style:font-size-complex="12pt" style:font-style-complex="italic"/>
    </style:style>
    <style:style style:name="T42" style:family="text">
      <style:text-properties officeooo:rsid="0010bc79"/>
    </style:style>
    <style:style style:name="T43" style:family="text">
      <style:text-properties fo:color="#000000" loext:opacity="100%" fo:language="ru" fo:country="RU" style:language-asian="ru" style:country-asian="RU"/>
    </style:style>
    <style:style style:name="T44" style:family="text">
      <style:text-properties style:font-size-complex="11pt"/>
    </style:style>
    <style:style style:name="T45" style:family="text">
      <style:text-properties fo:color="#000000" loext:opacity="100%" fo:font-size="8pt" fo:font-style="italic" style:font-name-asian="Times New Roman" style:font-size-asian="8pt" style:language-asian="ru" style:country-asian="RU" style:font-style-asian="italic" style:font-size-complex="8pt"/>
    </style:style>
    <style:style style:name="T46" style:family="text">
      <style:text-properties fo:color="#000000" loext:opacity="100%" fo:font-size="8pt" fo:font-style="italic" style:font-name-asian="Times New Roman" style:font-size-asian="8pt" style:language-asian="ru" style:country-asian="RU" style:font-style-asian="italic" style:font-size-complex="12pt"/>
    </style:style>
    <style:style style:name="T47" style:family="text">
      <style:text-properties fo:color="#000000" loext:opacity="100%" fo:font-size="8pt" fo:font-style="italic" fo:font-weight="bold" style:font-name-asian="Times New Roman" style:font-size-asian="8pt" style:language-asian="ru" style:country-asian="RU" style:font-style-asian="italic" style:font-weight-asian="bold" style:font-size-complex="12pt" style:font-weight-complex="bold"/>
    </style:style>
    <style:style style:name="T48" style:family="text">
      <style:text-properties officeooo:rsid="000d575b"/>
    </style:style>
    <style:style style:name="T49" style:family="text">
      <style:text-properties style:font-name-complex="Times New Roman" style:font-size-complex="12pt"/>
    </style:style>
    <style:style style:name="T50" style:family="text">
      <style:text-properties style:font-name-asian="Times New Roman"/>
    </style:style>
    <style:style style:name="T51" style:family="text">
      <style:text-properties fo:color="#000000" loext:opacity="100%" style:font-size-complex="12pt"/>
    </style:style>
    <style:style style:name="T52" style:family="text">
      <style:text-properties fo:color="#000000" loext:opacity="100%" fo:font-size="11pt" style:font-size-asian="11pt"/>
    </style:style>
    <style:style style:name="T53" style:family="text">
      <style:text-properties style:font-name-asian="Times New Roman" style:font-size-complex="12pt"/>
    </style:style>
    <style:style style:name="T54" style:family="text">
      <style:text-properties officeooo:rsid="000d575b" style:font-size-complex="12pt"/>
    </style:style>
    <style:style style:name="T55" style:family="text">
      <style:text-properties fo:color="#000000" loext:opacity="100%" fo:font-weight="bold" style:font-weight-asian="bold" style:font-size-complex="12pt" style:font-weight-complex="bold"/>
    </style:style>
    <style:style style:name="T56" style:family="text">
      <style:text-properties fo:color="#000000" loext:opacity="100%" fo:font-weight="bold" style:font-weight-asian="bold" style:font-size-complex="12pt"/>
    </style:style>
    <style:style style:name="T57" style:family="text">
      <style:text-properties style:font-name-complex="Times New Roman" style:font-size-complex="12pt" style:font-weight-complex="normal"/>
    </style:style>
    <style:style style:name="T5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9cm, -0.009cm, -0.009cm, -0.009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1.25pt solid #000000" style:mirror="none" fo:clip="rect(-0.067cm, -0.065cm, -0.067cm, -0.06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141cm, -0.004cm, -0.113cm, -0.03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173cm, -0.139cm, -0.129cm, -0.10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Изображение1" text:anchor-type="char" svg:x="-0.339cm" svg:y="-0.019cm" svg:width="2.891cm" svg:height="2.891cm" draw:z-index="3"><draw:image xlink:href="Pictures/10000000000000FB000000FB8A110427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2">Федеральное агентство по рыболовству</text:p>
            <text:p text:style-name="P3">Федеральное государственное бюджетное образовательное<text:span text:style-name="T1"/></text:p>
            <text:p text:style-name="P3">учреждение высшего образования<text:span text:style-name="T1"/></text:p>
            <text:p text:style-name="P3">«Астраханский государственный технический университет»<text:span text:style-name="T2"/></text:p>
            <text:p text:style-name="P4">Система менеджмента качества в области образования, воспитания, науки и инноваций сертифицирована<text:span text:style-name="T2"/></text:p>
            <text:p text:style-name="P4">ООО «ДКС РУС» по ISO 9001 / ГОСТ Р ИСО 9001<text:span text:style-name="T3"/></text:p>
            <text:p text:style-name="P5"/>
          </table:table-cell>
        </table:table-row>
      </table:table>
      <text:p text:style-name="P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table:number-columns-spanned="2" office:value-type="string">
            <text:p text:style-name="Standard">Институт<text:tab/> <text:span text:style-name="T4">Информационных технологий и коммуникаций</text:span><text:span text:style-name="T5"/></text:p>
            <text:p text:style-name="Standard"><text:span text:style-name="T6">Направление </text:span><text:bookmark-start text:name="_Hlk125055559"/><text:span text:style-name="T4">09.03.04 Программная инженерия</text:span><text:bookmark-end text:name="_Hlk125055559"/></text:p>
            <text:p text:style-name="Standard"><text:span text:style-name="T6">Профиль <text:s text:c="5"/></text:span><text:span text:style-name="T7">Разработка программно-информационных систем</text:span><text:span text:style-name="T8"> </text:span></text:p>
            <text:p text:style-name="Standard"><text:span text:style-name="T8">Кафедра</text:span><text:span text:style-name="T9"><text:tab/></text:span><text:span text:style-name="T7">Автоматизированные системы обработки информации и управления</text:span></text:p>
            <text:p text:style-name="P7">от ____.____________2026 № ______<text:span text:style-name="T10"/></text:p>
            <text:p text:style-name="P8">ОТЧЕТ ПО ПРАКТИКЕ<text:span text:style-name="T11"/></text:p>
            <text:p text:style-name="P9"><text:span text:style-name="T11">Вид практики: </text:span><text:span text:style-name="T12">производственная</text:span></text:p>
            <text:p text:style-name="P9"><text:span text:style-name="T11">Место прохождения практики:<text:line-break/></text:span><text:span text:style-name="T13">Астраханский государственный технический университет, <text:line-break/>кафедра «Автоматизированные системы обработки информации и управления»</text:span></text:p>
          </table:table-cell>
          <table:covered-table-cell/>
        </table:table-row>
        <table:table-row table:style-name="Таблица2.2">
          <table:table-cell table:style-name="Таблица2.A1" office:value-type="string">
            <text:h text:style-name="P10" text:outline-level="1"/>
          </table:table-cell>
          <table:table-cell table:style-name="Таблица2.A1" office:value-type="string">
            <text:p text:style-name="P11">Отчет выполнил:</text:p>
            <text:p text:style-name="P11">обучающийся группы ДИПРБ-31<text:span text:style-name="T7"/></text:p>
            <text:p text:style-name="P12">____________Наследсков Михаил Викторович</text:p>
          </table:table-cell>
        </table:table-row>
        <table:table-row table:style-name="Таблица2.3">
          <table:table-cell table:style-name="Таблица2.A1" office:value-type="string">
            <text:h text:style-name="P13" text:outline-level="1"/>
            <text:p text:style-name="P14"/>
          </table:table-cell>
          <table:table-cell table:style-name="Таблица2.A1" office:value-type="string">
            <text:p text:style-name="P11">Руководитель практики от Университета <text:line-break/>к.т.н., доцент</text:p>
            <text:p text:style-name="P15"><text:span text:style-name="T7">____________ Евсина Елена Михайловна</text:span><text:span text:style-name="T14"> </text:span></text:p>
            <text:p text:style-name="P15">Результаты защиты отчета <text:span text:style-name="T11"/></text:p>
            <text:p text:style-name="P11">Оценка, полученная на защите <text:span text:style-name="T11"/></text:p>
            <text:p text:style-name="P11">«________________» <text:span text:style-name="T11"/></text:p>
            <text:p text:style-name="P11">Члены комиссии: <text:span text:style-name="T11"/></text:p>
            <text:p text:style-name="P11">_________________ <text:s text:c="2"/><text:span text:style-name="T11"/></text:p>
            <text:p text:style-name="P11">_________________ <text:s text:c="2"/><text:span text:style-name="T11"/></text:p>
            <text:p text:style-name="P11">«____» _____________ 2026 г.</text:p>
          </table:table-cell>
        </table:table-row>
        <table:table-row table:style-name="Таблица2.4">
          <table:table-cell table:style-name="Таблица2.A4" table:number-columns-spanned="2" office:value-type="string">
            <text:p text:style-name="P16"/>
            <text:p text:style-name="P17"/>
            <text:p text:style-name="P17"/>
            <text:p text:style-name="P18">Астрахань 2026</text:p>
          </table:table-cell>
          <table:covered-table-cell/>
        </table:table-row>
      </table:table>
      <text:p text:style-name="P19">ИНДИВИДУАЛЬНЫЙ ПЛАН/ЗАДАНИЕ<text:span text:style-name="T15"/></text:p>
      <text:p text:style-name="Standard"><text:span text:style-name="T15">Вид практики</text:span><text:span text:style-name="T11">: учебная / </text:span><text:span text:style-name="T7">производственная</text:span><text:span text:style-name="T11"> / преддипломная</text:span></text:p>
      <text:p text:style-name="Standard"><text:span text:style-name="T15">Тип практики: </text:span> <text:span text:style-name="T16">эксплуатационная</text:span></text:p>
      <text:p text:style-name="Standard"><text:span text:style-name="T15">Способ проведения практики:</text:span><text:span text:style-name="T11"> выездная / </text:span><text:span text:style-name="T7">стационарная</text:span></text:p>
      <text:p text:style-name="Standard"><text:span text:style-name="T17">Обучающийся</text:span><text:span text:style-name="T18">   </text:span><text:span text:style-name="T19">    </text:span><text:span text:style-name="T20">Наследсков Михаил Викторович,</text:span></text:p>
      <text:p text:style-name="Standard"><text:span text:style-name="T15">Курс   3</text:span><text:span text:style-name="T11">    </text:span><text:span text:style-name="T15">группа</text:span><text:span text:style-name="T11">  </text:span><text:span text:style-name="T20">ДИПРб-31</text:span></text:p>
      <text:p text:style-name="P20"><text:s/><text:span text:style-name="T21"/></text:p>
      <text:p text:style-name="Standard"><text:span text:style-name="T21">Направление</text:span><text:span text:style-name="T6">  </text:span><text:bookmark-start text:name="_Hlk125055925"/><text:span text:style-name="T4">09.03.04 Программная инженерия</text:span><text:bookmark-end text:name="_Hlk125055925"/></text:p>
      <text:p text:style-name="P21"><text:span text:style-name="T21">Профиль</text:span><text:span text:style-name="T6"> </text:span><text:span text:style-name="T22">        </text:span><text:bookmark-start text:name="_Hlk125055943"/><text:span text:style-name="T7">Разработка программно-информационных систем</text:span><text:bookmark-end text:name="_Hlk125055943"/><text:span text:style-name="T7"><text:line-break/></text:span><text:span text:style-name="T17">Место проведения практики</text:span><text:span text:style-name="T18"> </text:span><text:span text:style-name="T20">Астраханский государственный технический университет, <text:line-break/>кафедра «Автоматизированные системы обработки информации и управления»</text:span><text:span text:style-name="T18"><text:line-break/></text:span></text:p>
      <text:p text:style-name="P22">Общее задание:<text:span text:style-name="T23"/></text:p>
      <text:p text:style-name="P23">Выполнение индивидуального задания: <text:span text:style-name="T11"/></text:p>
      <text:p text:style-name="P7">Анализ предметной области по теме «Автоматизированная система управления процессом публикации и сопровождения веб-игр»<text:span text:style-name="T24"/></text:p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Объем и краткое содержание (виды работ) практики<text:span text:style-name="T25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 table:style-name="Таблица3.1">
            <table:table-cell table:style-name="Таблица3.A1" office:value-type="string">
              <text:p text:style-name="P26">№<text:span text:style-name="T25"/></text:p>
              <text:p text:style-name="P26">п/п</text:p>
            </table:table-cell>
            <table:table-cell table:style-name="Таблица3.A1" office:value-type="string">
              <text:p text:style-name="P26">Раздел практики</text:p>
            </table:table-cell>
            <table:table-cell table:style-name="Таблица3.A1" office:value-type="string">
              <text:p text:style-name="P27">Формы текущего контроля успеваемости</text:p>
            </table:table-cell>
          </table:table-row>
        </table:table-header-rows>
        <table:table-row table:style-name="Таблица3.2">
          <table:table-cell table:style-name="Таблица3.A2" office:value-type="string">
            <text:p text:style-name="P28">1</text:p>
          </table:table-cell>
          <table:table-cell table:style-name="Таблица3.A2" office:value-type="string">
            <text:p text:style-name="P29">1 этап (подготовительный)<text:span text:style-name="T26"/></text:p>
            <text:p text:style-name="P30">1. Получение индивидуального задания на практику.<text:span text:style-name="T26"/></text:p>
            <text:p text:style-name="P30">2. Инструктаж по технике безопасности при работе на персональном компьютере и в компьютерном классе </text:p>
          </table:table-cell>
          <table:table-cell table:style-name="Таблица3.A2" office:value-type="string">
            <text:p text:style-name="P31">Регистрация в журнале по технике безопасности, собеседование </text:p>
          </table:table-cell>
        </table:table-row>
        <table:table-row table:style-name="Таблица3.3">
          <table:table-cell table:style-name="Таблица3.A2" office:value-type="string">
            <text:p text:style-name="P28">2</text:p>
          </table:table-cell>
          <table:table-cell table:style-name="Таблица3.A2" office:value-type="string">
            <text:p text:style-name="P29">2 этап (теоретический )<text:span text:style-name="T25"/></text:p>
            <text:p text:style-name="P29">Выполнение индивидуального задания: анализ предметной области<text:span text:style-name="T26"/></text:p>
            <text:p text:style-name="P30">1. Проведение анализа предметной области в соответствии с утвержденным планом;<text:span text:style-name="T26"/></text:p>
            <text:p text:style-name="P30">2. Поиск и анализ информации по индивидуальному заданию; сбор данных, необходимых для решения поставленных задач.</text:p>
          </table:table-cell>
          <table:table-cell table:style-name="Таблица3.A2" office:value-type="string">
            <text:p text:style-name="P32">Анализ предметной области, сбор информации, необходимой для разработки технического проекта </text:p>
          </table:table-cell>
        </table:table-row>
        <table:table-row table:style-name="Таблица3.4">
          <table:table-cell table:style-name="Таблица3.A2" office:value-type="string">
            <text:p text:style-name="P28">3</text:p>
          </table:table-cell>
          <table:table-cell table:style-name="Таблица3.A2" office:value-type="string">
            <text:p text:style-name="P29">3 этап: подготовка отчета по практике<text:span text:style-name="T26"/></text:p>
            <text:list text:style-name="WW8Num3">
              <text:list-item>
                <text:p text:style-name="P33" loext:marker-style-name="T26">Подготовка отчета, в котором должны быть отражены результаты работы.<text:span text:style-name="T26"/></text:p>
              </text:list-item>
              <text:list-item>
                <text:p text:style-name="P33" loext:marker-style-name="T26">Составление пояснительной записки в виде файла и твердой копии.<text:span text:style-name="T26"/></text:p>
              </text:list-item>
              <text:list-item>
                <text:p text:style-name="P33">Подготовка презентации для выступления на защите в комиссии кафедры</text:p>
              </text:list-item>
            </text:list>
          </table:table-cell>
          <table:table-cell table:style-name="Таблица3.A2" office:value-type="string">
            <text:p text:style-name="P30">Материал по результатам работы: письмен­ный отчет, электрон­ная презентация</text:p>
          </table:table-cell>
        </table:table-row>
        <table:table-row table:style-name="Таблица3.5">
          <table:table-cell table:style-name="Таблица3.A2" office:value-type="string">
            <text:p text:style-name="P28">4</text:p>
          </table:table-cell>
          <table:table-cell table:style-name="Таблица3.A2" office:value-type="string">
            <text:p text:style-name="P29">Заключительный этап:<text:span text:style-name="T26"/></text:p>
            <text:p text:style-name="P30">Защита отчета по практике на кафедре </text:p>
          </table:table-cell>
          <table:table-cell table:style-name="Таблица3.A2" office:value-type="string">
            <text:p text:style-name="P30">Отчет по результатам практики</text:p>
          </table:table-cell>
        </table:table-row>
        <table:table-row table:style-name="Таблица3.6"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29">Форма отчетности по практике </text:p>
          </table:table-cell>
          <table:table-cell table:style-name="Таблица3.A2" office:value-type="string">
            <text:p text:style-name="P30">Зачет с оценкой </text:p>
          </table:table-cell>
        </table:table-row>
      </table:table>
      <text:p text:style-name="P35"/>
      <text:p text:style-name="P35"/>
      <text:p text:style-name="P35"/>
      <text:p text:style-name="P35"/>
      <text:p text:style-name="P36"><text:span text:style-name="T18">Руководитель практики от Университета: </text:span><text:bookmark-start text:name="_Hlk125055990"/><text:span text:style-name="T27">к.т.н., доцент Евсина Елена Михайловна <text:s text:c="16"/></text:span><text:bookmark-end text:name="_Hlk125055990"/></text:p>
      <text:p text:style-name="P37">« <text:s/>» июль 2026 г. __________<text:span text:style-name="T28"/></text:p>
      <text:p text:style-name="P38">подпись<text:span text:style-name="T18"/></text:p>
      <text:p text:style-name="P39"><text:span text:style-name="T18">Задание выдал: </text:span><text:span text:style-name="T27">к.т.н., доцент Евсина Елена Михайловна</text:span><text:bookmark text:name="_Hlk234096889"/><text:span text:style-name="T14"> <text:s text:c="22"/></text:span></text:p>
      <text:p text:style-name="P40"><text:s/><text:span text:style-name="T18"/></text:p>
      <text:p text:style-name="P41">« <text:s/>» июль 2026 г. __________<text:span text:style-name="T28"/></text:p>
      <text:p text:style-name="P42">подпись<text:span text:style-name="T18"/></text:p>
      <text:p text:style-name="P15"><text:span text:style-name="T18">Задание получил</text:span><text:span text:style-name="T29">:</text:span><text:bookmark-start text:name="OLE_LINK1"/><text:span text:style-name="T7"> Наследсков Михаил Викторович</text:span><text:span text:style-name="T27"> </text:span></text:p>
      <text:p text:style-name="P37"><text:bookmark-end text:name="OLE_LINK1"/>« <text:s/>» июль 2026 г. __________<text:span text:style-name="T28"/></text:p>
      <text:p text:style-name="P42">подпись<text:span text:style-name="T30"/></text:p>
      <text:p text:style-name="P43"/>
      <text:p text:style-name="P44">РАБОЧИЙ ГРАФИК (ПЛАН) ПРОВЕДЕНИЯ ПРАКТИКИ</text:p>
      <text:p text:style-name="P45">2025/2026 учебный год<text:span text:style-name="T21"/></text:p>
      <text:p text:style-name="Standard"><text:span text:style-name="T21">Направление</text:span><text:span text:style-name="T6">  </text:span><text:span text:style-name="T4">09.03.04 Программная инженерия</text:span></text:p>
      <text:p text:style-name="P39"><text:span text:style-name="T21">Профиль</text:span><text:span text:style-name="T6">      </text:span><text:span text:style-name="T5">   </text:span><text:span text:style-name="T7">Разработка программно-информационных систем</text:span><text:span text:style-name="T6"><text:line-break/></text:span><text:span text:style-name="T31">Курс</text:span><text:span text:style-name="T32">            </text:span><text:span text:style-name="T33">    3, </text:span><text:span text:style-name="T32"> </text:span><text:span text:style-name="T31">группа</text:span><text:span text:style-name="T32">  </text:span><text:span text:style-name="T34">ДИПРб-31</text:span><text:span text:style-name="T33"><text:line-break/></text:span><text:span text:style-name="T31">Место прохождения практики</text:span><text:span text:style-name="T32"> </text:span><text:span text:style-name="T7">Астраханский государственный технический университет, <text:line-break/>кафедра «Автоматизированные системы обработки информации и управления»</text:span><text:span text:style-name="T18"><text:line-break/></text:span><text:span text:style-name="T32">Руководитель практики от Университета    </text:span><text:span text:style-name="T14">к.т.н., доцент Евсина Елена Михайловна <text:s text:c="21"/></text:span></text:p>
      <text:p text:style-name="P46"><text:span text:style-name="T21">Вид практики: </text:span><text:span text:style-name="T33">учебная</text:span><text:span text:style-name="T32"> / производственная / преддипломная</text:span></text:p>
      <text:p text:style-name="P46"><text:span text:style-name="T15">Тип практики: </text:span><text:span text:style-name="T4"> проектно-технологическая</text:span></text:p>
      <text:p text:style-name="P46"><text:span text:style-name="T15">Способ проведения практики</text:span><text:span text:style-name="T11">: выездная/</text:span><text:span text:style-name="T7">стационарная</text:span></text:p>
      <text:p text:style-name="P46"><text:span text:style-name="T21">Срок прохождения практики: </text:span><text:span text:style-name="T32">с </text:span><text:span text:style-name="T35">06</text:span><text:span text:style-name="T33">.0</text:span><text:span text:style-name="T35">7</text:span><text:span text:style-name="T33">.2026</text:span><text:span text:style-name="T32"> по </text:span><text:span text:style-name="T35">18</text:span><text:span text:style-name="T33">.0</text:span><text:span text:style-name="T35">7</text:span><text:span text:style-name="T33">.2026</text:span><text:span text:style-name="T32">.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47">Дата (сроки)</text:p>
          </table:table-cell>
          <table:table-cell table:style-name="Таблица4.B1" office:value-type="string">
            <text:p text:style-name="P47">Планируемые формы работы (раздел практики)</text:p>
          </table:table-cell>
        </table:table-row>
        <table:table-row table:style-name="Таблица4.1">
          <table:table-cell table:style-name="Таблица4.A1" office:value-type="string">
            <text:p text:style-name="P48">06.07.2026</text:p>
          </table:table-cell>
          <table:table-cell table:style-name="Таблица4.A1" office:value-type="string">
            <text:p text:style-name="P49">Цели и задачи практики, техника безопасности в компьютерном классе, постановка задачи</text:p>
          </table:table-cell>
        </table:table-row>
        <table:table-row table:style-name="Таблица4.1">
          <table:table-cell table:style-name="Таблица4.A1" office:value-type="string">
            <text:p text:style-name="P50">0<text:span text:style-name="T36">7</text:span>.07.2026</text:p>
          </table:table-cell>
          <table:table-cell table:style-name="Таблица4.A1" office:value-type="string">
            <text:p text:style-name="P51">Изучение организационной структуры и бизнес-модели предприятия</text:p>
          </table:table-cell>
        </table:table-row>
        <table:table-row table:style-name="Таблица4.1">
          <table:table-cell table:style-name="Таблица4.A4" office:value-type="string">
            <text:p text:style-name="P50">0<text:span text:style-name="T36">8</text:span>.07.2026</text:p>
          </table:table-cell>
          <table:table-cell table:style-name="Таблица4.A4" office:value-type="string">
            <text:p text:style-name="P51">Обзор и сравнительный анализ аналогичных решений</text:p>
          </table:table-cell>
        </table:table-row>
        <table:table-row table:style-name="Таблица4.1">
          <table:table-cell table:style-name="Таблица4.A4" office:value-type="string">
            <text:p text:style-name="P50">0<text:span text:style-name="T36">9</text:span>.07.2026</text:p>
          </table:table-cell>
          <table:table-cell table:style-name="Таблица4.A4" office:value-type="string">
            <text:p text:style-name="P51">Описание бизнес-процессов «AS-IS»</text:p>
          </table:table-cell>
        </table:table-row>
        <table:table-row table:style-name="Таблица4.1">
          <table:table-cell table:style-name="Таблица4.A4" office:value-type="string">
            <text:p text:style-name="P50"><text:span text:style-name="T36">10</text:span>.07.2026</text:p>
          </table:table-cell>
          <table:table-cell table:style-name="Таблица4.A4" office:value-type="string">
            <text:p text:style-name="P51">Описание бизнес-процессов «TO-BE»</text:p>
          </table:table-cell>
        </table:table-row>
        <table:table-row table:style-name="Таблица4.1">
          <table:table-cell table:style-name="Таблица4.A4" office:value-type="string">
            <text:p text:style-name="P50"><text:span text:style-name="T36">11</text:span>.07.2026</text:p>
          </table:table-cell>
          <table:table-cell table:style-name="Таблица4.A4" office:value-type="string">
            <text:p text:style-name="P51">Разработка диаграммы вариантов использования</text:p>
          </table:table-cell>
        </table:table-row>
        <table:table-row table:style-name="Таблица4.1">
          <table:table-cell table:style-name="Таблица4.A4" office:value-type="string">
            <text:p text:style-name="P50"><text:span text:style-name="T36">12</text:span>.07.2026</text:p>
          </table:table-cell>
          <table:table-cell table:style-name="Таблица4.A4" office:value-type="string">
            <text:p text:style-name="P52">Выходной день</text:p>
          </table:table-cell>
        </table:table-row>
        <table:table-row table:style-name="Таблица4.1">
          <table:table-cell table:style-name="Таблица4.A4" office:value-type="string">
            <text:p text:style-name="P50"><text:span text:style-name="T36">13</text:span>.07.2026</text:p>
          </table:table-cell>
          <table:table-cell table:style-name="Таблица4.A4" office:value-type="string">
            <text:p text:style-name="P53">Формулирование цели и задач разработки системы</text:p>
          </table:table-cell>
        </table:table-row>
        <table:table-row table:style-name="Таблица4.1">
          <table:table-cell table:style-name="Таблица4.A4" office:value-type="string">
            <text:p text:style-name="P50"><text:span text:style-name="T36">14</text:span>.07.2026</text:p>
          </table:table-cell>
          <table:table-cell table:style-name="Таблица4.A4" office:value-type="string">
            <text:p text:style-name="P53">Систематизация материалов анализа предметной области</text:p>
          </table:table-cell>
        </table:table-row>
        <table:table-row table:style-name="Таблица4.1">
          <table:table-cell table:style-name="Таблица4.A4" office:value-type="string">
            <text:p text:style-name="P50"><text:span text:style-name="T36">15</text:span>.07.2026</text:p>
          </table:table-cell>
          <table:table-cell table:style-name="Таблица4.A4" office:value-type="string">
            <text:p text:style-name="P53">Оформление раздела «Анализ предметной области» отчета</text:p>
          </table:table-cell>
        </table:table-row>
        <table:table-row table:style-name="Таблица4.1">
          <table:table-cell table:style-name="Таблица4.A1" office:value-type="string">
            <text:p text:style-name="P50"><text:span text:style-name="T36">16</text:span>.07.2026</text:p>
          </table:table-cell>
          <table:table-cell table:style-name="Таблица4.A1" office:value-type="string">
            <text:p text:style-name="P54">Подготовка отчета по практике</text:p>
          </table:table-cell>
        </table:table-row>
        <table:table-row table:style-name="Таблица4.1">
          <table:table-cell table:style-name="Таблица4.A1" office:value-type="string">
            <text:p text:style-name="P50"><text:span text:style-name="T36">17</text:span>.07.2026</text:p>
          </table:table-cell>
          <table:table-cell table:style-name="Таблица4.A1" office:value-type="string">
            <text:p text:style-name="P55">Защита отчета по практике</text:p>
          </table:table-cell>
        </table:table-row>
        <table:table-row table:style-name="Таблица4.1">
          <table:table-cell table:style-name="Таблица4.A1" office:value-type="string">
            <text:p text:style-name="P50"><text:span text:style-name="T36">18</text:span>.07.2026</text:p>
          </table:table-cell>
          <table:table-cell table:style-name="Таблица4.A1" office:value-type="string">
            <text:p text:style-name="P55">Оформление документации</text:p>
          </table:table-cell>
        </table:table-row>
      </table:table>
      <text:p text:style-name="P56"/>
      <text:p text:style-name="P15"><text:span text:style-name="T32">Руководитель практики от университета</text:span><text:span text:style-name="T37"> </text:span><text:span text:style-name="T27">к.т.н., доцент Евсина Елена Михайловна</text:span></text:p>
      <text:p text:style-name="P15"><text:bookmark-start text:name="_Hlk234098669"/><text:span text:style-name="T18">« <text:s/>» июль 2026 г. </text:span><text:bookmark-end text:name="_Hlk234098669"/><text:span text:style-name="T18">__________</text:span><text:span text:style-name="T38"/></text:p>
      <text:p text:style-name="P15"><text:span text:style-name="T38"><text:s text:c="47"/>подпись</text:span><text:span text:style-name="T39"/></text:p>
      <text:p text:style-name="P57"/>
      <text:p text:style-name="P15"><text:span text:style-name="T32">Обучающийся </text:span><text:span text:style-name="T27">Наследсков Михаил Викторович</text:span></text:p>
      <text:p text:style-name="P58"/>
      <text:p text:style-name="P58"/>
      <text:p text:style-name="P15"><text:span text:style-name="T18">« <text:s/>» июль 2026 г. __________</text:span><text:span text:style-name="T40"> </text:span></text:p>
      <text:p text:style-name="P59">ДНЕВНИК ПРАКТИКИ<text:span text:style-name="T15"/></text:p>
      <text:p text:style-name="P46"><text:span text:style-name="T15">Вид практики:</text:span><text:span text:style-name="T11"> </text:span><text:span text:style-name="T7">учебная</text:span><text:span text:style-name="T11"> / производственная/ преддипломная</text:span></text:p>
      <text:p text:style-name="P46"><text:span text:style-name="T15">Способ проведения практики: </text:span><text:span text:style-name="T11">выездная/</text:span><text:span text:style-name="T7">стационарная</text:span></text:p>
      <text:p text:style-name="P46"><text:span text:style-name="T17">Обучающийся</text:span><text:span text:style-name="T18"> </text:span><text:span text:style-name="T27">Наследсков Михаил Викторович</text:span><text:span text:style-name="T29">,</text:span><text:span text:style-name="T33"> группа </text:span><text:span text:style-name="T41">Д</text:span><text:span text:style-name="T34">ИПРБ-11</text:span></text:p>
      <text:p text:style-name="P39"><text:span text:style-name="T17">Направление</text:span><text:span text:style-name="T18">  </text:span><text:span text:style-name="T4">09.03.04 Программная инженерия</text:span><text:span text:style-name="T18"><text:line-break/></text:span><text:span text:style-name="T17">Профиль</text:span><text:span text:style-name="T18">         </text:span><text:span text:style-name="T7">Разработка программно-информационных систем</text:span></text:p>
      <text:p text:style-name="P46"><text:span text:style-name="T17">Место проведения практики</text:span><text:span text:style-name="T18"> </text:span><text:span text:style-name="T27">Астраханский государственный технический университет, <text:line-break/>кафедра «Автоматизированные системы обработки информации и управления»</text:span><text:span text:style-name="T18"><text:line-break/></text:span></text:p>
      <text:p text:style-name="P60"><text:span text:style-name="T18">Дата начала практики <text:s text:c="4"/>«</text:span><text:span text:style-name="T29">06</text:span><text:span text:style-name="T18">» </text:span><text:span text:style-name="T29">июля </text:span><text:span text:style-name="T18">202</text:span><text:span text:style-name="T29">6</text:span><text:span text:style-name="T18"> г.</text:span></text:p>
      <text:p text:style-name="P60"><text:span text:style-name="T18">Дата окончания практики «</text:span><text:span text:style-name="T29">18</text:span><text:span text:style-name="T18">» </text:span><text:span text:style-name="T29">июля</text:span><text:span text:style-name="T18"> 202</text:span><text:span text:style-name="T29">6</text:span><text:span text:style-name="T18"> </text:span>г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header-rows>
          <table:table-row table:style-name="Таблица5.1">
            <table:table-cell table:style-name="Таблица5.A1" office:value-type="string">
              <text:p text:style-name="P61">Дата</text:p>
            </table:table-cell>
            <table:table-cell table:style-name="Таблица5.A1" office:value-type="string">
              <text:p text:style-name="P47">Наименование <text:line-break/>и ход работ, </text:p>
            </table:table-cell>
            <table:table-cell table:style-name="Таблица5.A1" office:value-type="string">
              <text:p text:style-name="P61">Краткое описание работы</text:p>
            </table:table-cell>
          </table:table-row>
        </table:table-header-rows>
        <table:table-row table:style-name="Таблица5.2">
          <table:table-cell table:style-name="Таблица5.A2" office:value-type="string">
            <text:p text:style-name="P48">06.07.2026</text:p>
          </table:table-cell>
          <table:table-cell table:style-name="Таблица5.A2" office:value-type="string">
            <text:p text:style-name="P49">Цели и задачи практики, техника безопасности в компьютерном классе, постановка задачи</text:p>
          </table:table-cell>
          <table:table-cell table:style-name="Таблица5.A2" office:value-type="string">
            <text:p text:style-name="P49">Изучена инструкция по технике безопасности в компьютерном классе. Получено индивидуальное задание на практику.</text:p>
          </table:table-cell>
        </table:table-row>
        <table:table-row table:style-name="Таблица5.1">
          <table:table-cell table:style-name="Таблица5.A2" office:value-type="string">
            <text:p text:style-name="P50">0<text:span text:style-name="T36">7</text:span>.07.2026</text:p>
          </table:table-cell>
          <table:table-cell table:style-name="Таблица5.A2" office:value-type="string">
            <text:p text:style-name="P62">Изучение структуры и бизнес-модели предприятия</text:p>
          </table:table-cell>
          <table:table-cell table:style-name="Таблица5.A2" office:value-type="string">
            <text:p text:style-name="P55">Собрана информация об истории компании, структуре, <text:span text:style-name="T42">модели </text:span>монетизации платформы.</text:p>
          </table:table-cell>
        </table:table-row>
        <table:table-row table:style-name="Таблица5.1">
          <table:table-cell table:style-name="Таблица5.A4" office:value-type="string">
            <text:p text:style-name="P50">0<text:span text:style-name="T36">8</text:span>.07.2026</text:p>
          </table:table-cell>
          <table:table-cell table:style-name="Таблица5.A4" office:value-type="string">
            <text:p text:style-name="P62">Обзор и сравнительный анализ аналогичных решений</text:p>
          </table:table-cell>
          <table:table-cell table:style-name="Таблица5.A4" office:value-type="string">
            <text:p text:style-name="P55">Проведен анализ функционала платформ-<text:span text:style-name="T36">аналогов</text:span>, составлена сравнительная таблица..</text:p>
          </table:table-cell>
        </table:table-row>
        <table:table-row table:style-name="Таблица5.1">
          <table:table-cell table:style-name="Таблица5.A4" office:value-type="string">
            <text:p text:style-name="P50">0<text:span text:style-name="T36">9</text:span>.07.2026</text:p>
          </table:table-cell>
          <table:table-cell table:style-name="Таблица5.A4" office:value-type="string">
            <text:p text:style-name="P62">Описание бизнес-процессов «AS-IS»</text:p>
          </table:table-cell>
          <table:table-cell table:style-name="Таблица5.A4" office:value-type="string">
            <text:p text:style-name="P55">Проведено моделирование текущих процессов публикации и управления веб-играми, построена диаграмма модели «AS-IS», выявлены проблемные зоны процесса.</text:p>
          </table:table-cell>
        </table:table-row>
        <table:table-row table:style-name="Таблица5.1">
          <table:table-cell table:style-name="Таблица5.A4" office:value-type="string">
            <text:p text:style-name="P50"><text:span text:style-name="T36">10</text:span>.07.2026</text:p>
          </table:table-cell>
          <table:table-cell table:style-name="Таблица5.A4" office:value-type="string">
            <text:p text:style-name="P62">Описание бизнес-процессов «TO-BE»</text:p>
          </table:table-cell>
          <table:table-cell table:style-name="Таблица5.A4" office:value-type="string">
            <text:p text:style-name="P55">Спроектирована целевая модель бизнес-процессов с учетом внедрения автоматизированной системы, построена диаграмма «TO-BE».</text:p>
          </table:table-cell>
        </table:table-row>
        <table:table-row table:style-name="Таблица5.1">
          <table:table-cell table:style-name="Таблица5.A4" office:value-type="string">
            <text:p text:style-name="P50"><text:span text:style-name="T36">11</text:span>.07.2026</text:p>
          </table:table-cell>
          <table:table-cell table:style-name="Таблица5.A4" office:value-type="string">
            <text:p text:style-name="P62">Разработка диаграммы вариантов использования</text:p>
          </table:table-cell>
          <table:table-cell table:style-name="Таблица5.A4" office:value-type="string">
            <text:p text:style-name="P55">Определены роли пользователей системы, построена диаграмма вариантов использования.</text:p>
          </table:table-cell>
        </table:table-row>
        <table:table-row table:style-name="Таблица5.8">
          <table:table-cell table:style-name="Таблица5.A4" office:value-type="string">
            <text:p text:style-name="P50"><text:span text:style-name="T36">13</text:span>.07.2026</text:p>
          </table:table-cell>
          <table:table-cell table:style-name="Таблица5.A4" office:value-type="string">
            <text:p text:style-name="P62">Формулирование цели и задач разработки системы</text:p>
          </table:table-cell>
          <table:table-cell table:style-name="Таблица5.A4" office:value-type="string">
            <text:p text:style-name="P55">Сформулированы цель проекта, ключевые показатели эффективности и перечень задач.</text:p>
          </table:table-cell>
        </table:table-row>
        <table:table-row table:style-name="Таблица5.1">
          <table:table-cell table:style-name="Таблица5.A4" office:value-type="string">
            <text:p text:style-name="P50"><text:span text:style-name="T36">14</text:span>.07.2026</text:p>
          </table:table-cell>
          <table:table-cell table:style-name="Таблица5.A4" office:value-type="string">
            <text:p text:style-name="P62">Систематизация материалов </text:p>
          </table:table-cell>
          <table:table-cell table:style-name="Таблица5.A4" office:value-type="string">
            <text:p text:style-name="P55">Систематизация полученных материалов. Написание введения.</text:p>
          </table:table-cell>
        </table:table-row>
        <table:table-row table:style-name="Таблица5.1">
          <table:table-cell table:style-name="Таблица5.A4" office:value-type="string">
            <text:p text:style-name="P50"><text:span text:style-name="T36">15</text:span>.07.2026</text:p>
          </table:table-cell>
          <table:table-cell table:style-name="Таблица5.A4" office:value-type="string">
            <text:p text:style-name="P63"><text:span text:style-name="T43">Оформление раздела </text:span>«Анализ предметной области» отчета</text:p>
          </table:table-cell>
          <table:table-cell table:style-name="Таблица5.A4" office:value-type="string">
            <text:p text:style-name="P64">Оформлен раздел отчета «Технический проект<text:span text:style-name="T44">».</text:span></text:p>
          </table:table-cell>
        </table:table-row>
        <table:table-row table:style-name="Таблица5.11">
          <table:table-cell table:style-name="Таблица5.A2" office:value-type="string">
            <text:p text:style-name="P50"><text:span text:style-name="T36">16</text:span>.07.2026</text:p>
          </table:table-cell>
          <table:table-cell table:style-name="Таблица5.A2" office:value-type="string">
            <text:p text:style-name="P65">Подготовка отчета по практике</text:p>
          </table:table-cell>
          <table:table-cell table:style-name="Таблица5.A2" office:value-type="string">
            <text:p text:style-name="P64">Систематизация полученных материалов. Написание <text:span text:style-name="T42">заключения</text:span>.</text:p>
          </table:table-cell>
        </table:table-row>
        <table:table-row table:style-name="Таблица5.1">
          <table:table-cell table:style-name="Таблица5.A2" office:value-type="string">
            <text:p text:style-name="P50"><text:span text:style-name="T36">17</text:span>.07.2026</text:p>
          </table:table-cell>
          <table:table-cell table:style-name="Таблица5.A2" office:value-type="string">
            <text:p text:style-name="P55">Защита отчета по практике</text:p>
          </table:table-cell>
          <table:table-cell table:style-name="Таблица5.A2" office:value-type="string">
            <text:p text:style-name="P55">Подготовка презентационных материалов. Защита результатов прохождения практики.</text:p>
          </table:table-cell>
        </table:table-row>
        <table:table-row table:style-name="Таблица5.1">
          <table:table-cell table:style-name="Таблица5.A2" office:value-type="string">
            <text:p text:style-name="P50"><text:span text:style-name="T36">18</text:span>.07.2026</text:p>
          </table:table-cell>
          <table:table-cell table:style-name="Таблица5.A2" office:value-type="string">
            <text:p text:style-name="P55">Оформление документации</text:p>
          </table:table-cell>
          <table:table-cell table:style-name="Таблица5.A2" office:value-type="string">
            <text:p text:style-name="P55">Подписание <text:span text:style-name="T42">докумментов</text:span> практики.</text:p>
          </table:table-cell>
        </table:table-row>
      </table:table>
      <text:p text:style-name="P56"/>
      <text:p text:style-name="P15"><text:span text:style-name="T32">Руководитель практики от университета </text:span><text:span text:style-name="T27">к.т.н., доцент Евсина Елена Михайловна</text:span></text:p>
      <text:p text:style-name="P66">«18» июля 2026 г. __________<text:span text:style-name="T45"/></text:p>
      <text:p text:style-name="P15"><text:span text:style-name="T45"><text:s text:c="55"/>подпись</text:span><text:span text:style-name="T46"/></text:p>
      <text:p text:style-name="P67"><text:span text:style-name="T32">Обучающийся </text:span><text:span text:style-name="T20">Наследсков Михаил Викторович</text:span></text:p>
      <text:p text:style-name="P66">«18» июля 2026 г. __________<text:span text:style-name="T45"/></text:p>
      <text:p text:style-name="P15"><text:span text:style-name="T45"><text:s text:c="55"/>подпись</text:span><text:span text:style-name="T47"/></text:p>
      <text:p text:style-name="P68">СОДЕРЖАНИЕ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9"><text:a xlink:type="simple" xlink:href="#__RefHeading___Toc234097766" text:style-name="Index_20_Link_20__28_user_29_" text:visited-style-name="Index_20_Link_20__28_user_29_"><text:span text:style-name="Index_20_Link"><text:s/>Введение<text:tab/>7</text:span></text:a></text:p>
          <text:p text:style-name="P69"><text:a xlink:type="simple" xlink:href="#__RefHeading___Toc234097767" text:style-name="Index_20_Link_20__28_user_29_" text:visited-style-name="Index_20_Link_20__28_user_29_"><text:span text:style-name="Index_20_Link">1 Технический проект<text:tab/>8</text:span></text:a></text:p>
          <text:p text:style-name="P70"><text:a xlink:type="simple" xlink:href="#__RefHeading___Toc8441_3300070494" text:style-name="Index_20_Link_20__28_user_29_" text:visited-style-name="Index_20_Link_20__28_user_29_"><text:span text:style-name="Index_20_Link">1.1. Анализ предметной области<text:tab/>8</text:span></text:a></text:p>
          <text:p text:style-name="P71"><text:a xlink:type="simple" xlink:href="#__RefHeading___Toc8443_3300070494" text:style-name="Index_20_Link_20__28_user_29_" text:visited-style-name="Index_20_Link_20__28_user_29_"><text:span text:style-name="Index_20_Link">1.1.1. Общая информация и организационная структура предприятия<text:tab/>8</text:span></text:a></text:p>
          <text:p text:style-name="P71"><text:a xlink:type="simple" xlink:href="#__RefHeading___Toc234097770" text:style-name="Index_20_Link_20__28_user_29_" text:visited-style-name="Index_20_Link_20__28_user_29_"><text:span text:style-name="Index_20_Link">1.1.2. Бизнес-процессы проблемной зоны предприятия<text:tab/>11</text:span></text:a></text:p>
          <text:p text:style-name="P70"><text:a xlink:type="simple" xlink:href="#__RefHeading___Toc234097771" text:style-name="Index_20_Link_20__28_user_29_" text:visited-style-name="Index_20_Link_20__28_user_29_"><text:span text:style-name="Index_20_Link">1.2. Обзор аналогичных решений<text:tab/>13</text:span></text:a></text:p>
          <text:p text:style-name="P70"><text:a xlink:type="simple" xlink:href="#__RefHeading___Toc8445_3300070494" text:style-name="Index_20_Link_20__28_user_29_" text:visited-style-name="Index_20_Link_20__28_user_29_"><text:span text:style-name="Index_20_Link">1.3. Цель и задачи<text:tab/>15</text:span></text:a></text:p>
          <text:p text:style-name="P69"><text:a xlink:type="simple" xlink:href="#__RefHeading___Toc1224_44559829" text:style-name="Index_20_Link_20__28_user_29_" text:visited-style-name="Index_20_Link_20__28_user_29_"><text:span text:style-name="Index_20_Link"><text:s/>Заключение<text:tab/>17</text:span></text:a></text:p>
          <text:p text:style-name="P69"><text:a xlink:type="simple" xlink:href="#__RefHeading___Toc1226_44559829" text:style-name="Index_20_Link_20__28_user_29_" text:visited-style-name="Index_20_Link_20__28_user_29_"><text:span text:style-name="Index_20_Link"><text:s/>Список спользованных источников<text:tab/>18</text:span></text:a></text:p>
          <text:p text:style-name="P69"><text:a xlink:type="simple" xlink:href="#__RefHeading___Toc1228_44559829" text:style-name="Index_20_Link_20__28_user_29_" text:visited-style-name="Index_20_Link_20__28_user_29_"><text:span text:style-name="Index_20_Link"><text:s/>Приложение 1. </text:span><text:span text:style-name="Index_20_Link"><text:span text:style-name="T48">Модель</text:span></text:span><text:span text:style-name="Index_20_Link"> AS-IS<text:tab/>19</text:span></text:a></text:p>
          <text:p text:style-name="P69"><text:a xlink:type="simple" xlink:href="#__RefHeading___Toc1230_44559829" text:style-name="Index_20_Link_20__28_user_29_" text:visited-style-name="Index_20_Link_20__28_user_29_"><text:span text:style-name="Index_20_Link"><text:s/>Приложение 2. </text:span><text:span text:style-name="Index_20_Link"><text:span text:style-name="T48">Модель</text:span></text:span><text:span text:style-name="Index_20_Link"> TO-BE<text:tab/>20</text:span></text:a></text:p>
          <text:p text:style-name="P69"><text:a xlink:type="simple" xlink:href="#__RefHeading___Toc1232_44559829" text:style-name="Index_20_Link_20__28_user_29_" text:visited-style-name="Index_20_Link_20__28_user_29_"><text:span text:style-name="Index_20_Link"><text:s/>Приложение 3. Диаграмма вариантов исппользования<text:tab/>21</text:span></text:a></text:p>
          <text:p text:style-name="P69"><text:a xlink:type="simple" xlink:href="#__RefHeading___Toc1234_44559829" text:style-name="Index_20_Link_20__28_user_29_" text:visited-style-name="Index_20_Link_20__28_user_29_"><text:span text:style-name="Index_20_Link"><text:s/>Приложение 4. Инфологическая модель<text:tab/>22</text:span></text:a></text:p>
        </text:index-body>
      </text:table-of-content>
      <text:p text:style-name="P72"/>
      <text:h text:style-name="P73" text:outline-level="1"><text:bookmark-start text:name="__RefHeading___Toc234097766"/>ВВЕДЕНИЕ<text:bookmark-end text:name="__RefHeading___Toc234097766"/></text:h>
      <text:p text:style-name="P74">Динамичное развитие рынка веб-игр требует от игровых платформ эффективных и быстрых инструментов для авторов контента. Платформа Welwise Games представляет собой площадку для размещения проектов разработчиков . В условиях роста числа проектов текущий ручной подход к управлению публикациями потерял масштабируемость. Это вызвало <text:s/>потребность в создании автоматизированной системы, которая позволит авторам управлять своими проектами без постоянного участия специалистов платформы.<text:span text:style-name="T11"/></text:p>
      <text:p text:style-name="P75">Объектом автоматизации в рамках данной работы является инфраструктура и организационная среда игровой платформы Welwise Games. Предметом автоматизации выступают процессы публикации, модерации и инфраструктурного сопровождения веб-игр на данной площадке.<text:span text:style-name="T11"/></text:p>
      <text:p text:style-name="P76">Текущие процессы платформы имеют ряд существенных недостатков:<text:span text:style-name="T11"/></text:p>
      <text:list text:style-name="WW8Num5">
        <text:list-item>
          <text:p text:style-name="P77" loext:marker-style-name="T11">Зависимость от инженера: Настройка конвейера развертывания для каждой новой игры требует ручного копирования и адаптации скриптов инженером по эксплуатации, из-за чего разработчик не может самостоятельно устранять сбои.<text:span text:style-name="T11"/></text:p>
        </text:list-item>
        <text:list-item>
          <text:p text:style-name="P77" loext:marker-style-name="T11">Непрозрачная модерация: Взаимодействие между авторами контента и платформой ведется через внешние мессенджеры, что приводит к потере контекста и отсутствию единой ленты запросов.<text:span text:style-name="T11"/></text:p>
        </text:list-item>
        <text:list-item>
          <text:p text:style-name="P77" loext:marker-style-name="T11">Ограничение доступа: Разработчики не имеют прямого доступа к управлению игровыми серверами.<text:span text:style-name="T11"/></text:p>
        </text:list-item>
        <text:list-item>
          <text:p text:style-name="P77" loext:marker-style-name="T11">Задержки отчетности: Аналитическая отчетность по играм формируется менеджером вручную и отправляется авторам только раз в месяц.<text:span text:style-name="T11"/></text:p>
        </text:list-item>
      </text:list>
      <text:p text:style-name="P76">Использование слабо связанных инструментов, таких как сторонние мессенджеры, ручные конфигурации CI/CD и настольное ПО для аналитики, было оправдано только на ранних этапах развития площадки. Отказ от них обусловлен невозможностью масштабирования процессов, отсутствием единого рабочего пространства и нерациональными затратами времени инженеров на рутинные операции.</text:p>
      <text:p text:style-name="P78">Целью проекта является разработка автоматизированной системы, повышающей эффективность процессов публикации и сопровождения веб-игр. Успешность внедрения системы оценивается по следующим измеримым показателям<text:span text:style-name="T11">:</text:span><text:span text:style-name="T11"/></text:p>
      <text:list text:style-name="WW8Num11">
        <text:list-item>
          <text:p text:style-name="P79" loext:marker-style-name="T11">Сокращение времени подготовки черновика игры с 9 дней до 1–2 часов.<text:span text:style-name="T11"/></text:p>
        </text:list-item>
        <text:list-item>
          <text:p text:style-name="P79" loext:marker-style-name="T11">Уменьшение сроков модерации с 5 до 1–2 дней благодаря внедрению сквозного чата.<text:span text:style-name="T11"/></text:p>
        </text:list-item>
        <text:list-item>
          <text:p text:style-name="P79" loext:marker-style-name="T11">Обеспечение разработчиков посуточной аналитикой вместо ежемесячной.<text:span text:style-name="T11"/></text:p>
        </text:list-item>
        <text:list-item>
          <text:p text:style-name="P79" loext:marker-style-name="T11">Сведение к нулю обращений к инженерам для управления игровыми серверами.<text:span text:style-name="T11"/></text:p>
        </text:list-item>
      </text:list>
      <text:p text:style-name="P80"/>
      <text:list text:style-name="WW8Num2">
        <text:list-item>
          <text:h text:style-name="P81" text:outline-level="1" loext:marker-style-name="T49"><text:bookmark-start text:name="__RefHeading___Toc234097767"/>Технический проект<text:bookmark-end text:name="__RefHeading___Toc234097767"/><text:span text:style-name="T49"/></text:h>
        </text:list-item>
      </text:list>
      <text:list xml:id="list628324673" text:style-name="WW8Num4">
        <text:list-item>
          <text:list>
            <text:list-item>
              <text:h text:style-name="P82" text:outline-level="2" loext:marker-style-name="T50"><text:bookmark-start text:name="__RefHeading___Toc8441_3300070494"/>Анализ предметной области <text:bookmark-end text:name="__RefHeading___Toc8441_3300070494"/><text:span text:style-name="T50"/></text:h>
            </text:list-item>
          </text:list>
        </text:list-item>
      </text:list>
      <text:h text:style-name="P83" text:outline-level="3" loext:marker-style-name="T51"><text:bookmark-start text:name="__RefHeading___Toc8443_3300070494"/><text:span text:style-name="T50"><text:s/></text:span>Общая информация и организационная структура предприятия<text:bookmark-end text:name="__RefHeading___Toc8443_3300070494"/></text:h>
      <text:p text:style-name="P84">Предприятие, юридически представленное индивидуальным предпринимателем Тепловым Савелием Дмитриевичем, ведет свою историю с 2021 года. На начальном этапе команда функционировала под брендом Welwise Studio и специализировалась исключительно на самостоятельной разработке игровых проектов. Первоначальные попытки создания масштабных высокобюджетных игр сменились стратегическим переходом к разработке более востребованных на рынке веб-игр. После выхода на отечественные площадки дистрибуции и выпуска десятков коммерчески успешных продуктов, предприятие значительно расширило направления деятельности. Был осуществлен переход к созданию кроссплатформенных проектов для мобильных и персональных устройств, начата активная публикация на зарубежных ресурсах, а также реализован отдельный проект для крупнейшей цифровой витрины Steam. Параллельно команда освоила корпоративный сектор, реализуя B2B-проекты по геймификации, включая разработку интерактивных программ лояльности для сетей общественного питания. Накопленная за эти годы техническая и управленческая экспертиза отчетливо выявила ключевую проблему индустрии: независимые авторы регулярно сталкиваются с серьезными барьерами при запуске и оперировании онлайн-проектов. Ответом на этот вызов рынка стала трансформация бизнес-модели и запуск в 2025 году собственной издательской платформы Welwise Games. Глобальная миссия предприятия заключается в предоставлении инди-разработчикам инфраструктуры, которая позволит им создавать не просто отдельные игры, а целые метавселенные, объединенные общим пользовательским прогрессом и единой виртуальной экономикой.<text:span text:style-name="T51"/></text:p>
      <text:p text:style-name="P84">Долгосрочная стратегия развития платформы направлена на формирование комплексной, полностью автономной экосистемы для создателей игрового контента. В рамках этой стратегии приоритетными задачами являются масштабирование серверной инфраструктуры для поддержки высоконагруженных многопользовательских проектов, расширение географии присутствия за счет локализации платформы для иностранных рынков, а также привлечение новых студий-партнеров. Особое внимание уделяется автоматизации рутинных процессов взаимодействия с авторами, что должно существенно снизить операционные издержки предприятия и ускорить вывод новых игровых продуктов на рынок. В перспективе планируется интеграция расширенных аналитических инструментов и создание единого социального пространства для игроков.<text:span text:style-name="T51"/></text:p>
      <text:p text:style-name="P84"><text:soft-page-break/>Юридической и правовой основой функционирования предприятия является статус индивидуального предпринимателя, официально зарегистрированного 30 августа 2024 года с присвоением ОГРНИП 324595800107064. Основным видом экономической деятельности предприятия официально закреплена разработка компьютерного программного обеспечения. Для обеспечения полного правового покрытия всех аспектов издательского бизнеса и монетизации в качестве дополнительных видов деятельности зарегистрированы издание компьютерных игр, издание прочих программных продуктов, а также деятельность рекламных агентств. Данная правовая конфигурация позволяет платформе легитимно выступать в роли издателя, оперировать интеллектуальной собственностью партнеров и осуществлять коммерческую деятельность в сфере цифровой рекламы.<text:span text:style-name="T51"/></text:p>
      <text:p text:style-name="P84">Взаимодействие с независимыми разработчиками выстраивается на базе договора публичной оферты и соглашения о сотрудничестве. В рамках данных соглашений авторы передают издателю простую неисключительную лицензию на публикацию, продвижение и любое иное использование игры для широкой аудитории. Со своей стороны, разработчики обязуются предоставлять полностью работоспособные копии проектов, обеспечивать наличие обязательной возрастной маркировки и гарантировать юридическую чистоту авторских прав, строго соблюдая запрет на публикацию вредоносного или законодательно недопустимого контента. При этом исключительное право на саму игру неотчуждаемо и остается за разработчиком, который сохраняет за собой полную свободу продвигать продукт под собственным брендом на других ресурсах. Взаимодействие с конечными потребителями (игроками) на самой площадке дополнительно регламентируется пользовательским соглашением и политикой конфиденциальности.<text:span text:style-name="T51"/></text:p>
      <text:p text:style-name="P84">Бизнес-модель предприятия базируется на принципах разделения доходов от различных каналов монетизации. Основной доход формируется за счет интеграции внутриигровых покупок (микротранзакций), а также показов нескольких форматов рекламы: классической баннерной, полноэкранной межстраничной и рекламы с вознаграждением за просмотр. Все входящие финансовые потоки от рекламных сетей и платежных агрегаторов изначально аккумулируются на расчетном счете предприятия. В соответствии с установленными условиями сотрудничества, платформа берет на себя формирование ежемесячной аналитической и финансовой статистики. Выплата причитающейся доли разработчикам осуществляется в течение 45 дней по завершении отчетного периода при условии достижения минимального порога вывода в 5000 рублей. Издатель не берет на себя функции налогового агента, поэтому разработчики самостоятельно несут ответственность за декларирование доходов и уплату соответствующих налогов и сборов.<text:span text:style-name="T51"/></text:p>
      <text:p text:style-name="P84">Организационно-управленческая структура предприятия построена по линейно-<text:soft-page-break/>функциональному принципу, что обеспечивает гибкость и высокую скорость принятия решений. Как наглядно представлено на рисунке 1, во главе структуры находится основатель (индивидуальный предприниматель), который определяет стратегический вектор развития и принимает ключевые управленческие решения. Оперативное управление повседневной деятельностью предприятия делегировано соучредителю, выступающему в роли ведущего менеджера. В его прямом функциональном подчинении находятся три профильных подразделения: технический отдел, отдел модерации и студия внутренней разработки игр. Технический отдел несет комплексную ответственность за программную и аппаратную инфраструктуру платформы; в его состав входят разработчик серверной части, разработчик клиентской части и инженер по эксплуатации. За первичную проверку поступающих на публикацию игр, их тестирование на соответствие техническим регламентам и правовым нормам отвечает выделенный специалист по модерации. Студия внутренней разработки функционирует по проектной модели, привлекая разработчиков на движке Unity и цифровых художников для создания эксклюзивных проектов, призванных расширять собственную линейку продуктов игровой площадки.</text:p>
      <text:p text:style-name="P85"><draw:frame draw:style-name="fr2" draw:name="Изображение4" text:anchor-type="as-char" svg:width="16.529cm" svg:height="12.517cm" draw:z-index="0"><draw:image xlink:href="Pictures/100000010000085E0000058C365BC112.png" xlink:type="simple" xlink:show="embed" xlink:actuate="onLoad" draw:mime-type="image/png"/></draw:frame></text:p>
      <text:p text:style-name="P86">Рисунок 1.1 Организационная структура ИП. Теплов С.Д<text:span text:style-name="T52"/></text:p>
      <text:p text:style-name="P86"/>
      <text:h text:style-name="P83" text:outline-level="3" loext:marker-style-name="T11"><text:bookmark-start text:name="__RefHeading___Toc234097770"/><text:soft-page-break/>Бизнес-процессы проблемной зоны предприятия<text:bookmark-end text:name="__RefHeading___Toc234097770"/></text:h>
      <text:p text:style-name="P87">В Функционирование платформы Welwise Games связано с процессом публикации и последующего сопровождения веб-игр. Данный процесс охватывает весь жизненный цикл проекта на площадке: от предоставления первых сборок до получения разработчиком аналитики по работающей игре.<text:span text:style-name="T11"/></text:p>
      <text:p text:style-name="P87">В настоящее время бизнес-процесс «Публикация и управление веб-играми», модель «AS-IS», представлена в Приложении 1, характеризуется высокой степенью ручного труда и зависимостью от профильных специалистов платформы. Процесс инициируется при получении входных данных: сборки веб-игры, сборки игрового сервера, метаданных и промо-материалов, а также команд управления сервером. Выполнение регламентируется требованиями к играм, руководством разработчика и правилами непрерывной интеграции и непрерывной доставки.<text:span text:style-name="T11"/></text:p>
      <text:p text:style-name="P87">Декомпозиция текущего бизнес-процесса включает пять основных этапов:<text:span text:style-name="T11"/></text:p>
      <text:list text:style-name="WW8Num6">
        <text:list-item>
          <text:p text:style-name="P88" loext:marker-style-name="T11">Настроить процессы непрерывной интеграции. Выполняется инженером по эксплуатации, который вручную конфигурирует сценарии сборки для каждой новой игры.<text:span text:style-name="T11"/></text:p>
        </text:list-item>
        <text:list-item>
          <text:p text:style-name="P88" loext:marker-style-name="T11">Развернуть предварительные сборки. Осуществляется разработчиком игры с использованием подготовленных инженером сценариев для получения предварительных версий веб-игры и сервера.<text:span text:style-name="T11"/></text:p>
        </text:list-item>
        <text:list-item>
          <text:p text:style-name="P88" loext:marker-style-name="T11">Выполнить проверку и модерацию. Осуществляется модератором, а все взаимодействие с разработчиком ведется через мессенджер Telegram.<text:span text:style-name="T11"/></text:p>
        </text:list-item>
        <text:list-item>
          <text:p text:style-name="P88" loext:marker-style-name="T11">Перевести в промышленную эксплуатацию. Перенос одобренной игры и запуск игровых серверов вновь требует привлечения инженера по эксплуатации, который принимает команды управления через мессенджер.<text:span text:style-name="T11"/></text:p>
        </text:list-item>
        <text:list-item>
          <text:p text:style-name="P88" loext:marker-style-name="T11">Подготовить аналитическую отчетность. Осуществляется менеджером платформы с помощью разрозненной программы для формирования отчетов, после чего сформированный месячный аналитический отчет передается автору игры.<text:span text:style-name="T11"/></text:p>
        </text:list-item>
      </text:list>
      <text:p text:style-name="P87">Основной проблемной зоной текущей модели является использование неспециализированных инструментов коммуникации (Telegram), внешних программ генерации отчетов и нерациональное расходование человеческих ресурсов. Роли инженера по эксплуатации и менеджера выступают «узким горлышком» системы. Необходимость их постоянного участия блокирует самостоятельность разработчиков и ограничивает пропускную способность платформы при масштабировании.<text:span text:style-name="T11"/></text:p>
      <text:p text:style-name="P89">Текущий уровень зрелости ИТ-процессов в анализируемой проблемной зоне можно охарактеризовать как низкий. Информационное пространство предприятия сильно фрагментировано и состоит из разрозненных программных продуктов:<text:span text:style-name="T11"/></text:p>
      <text:list xml:id="list2092563204" text:style-name="WW8Num7">
        <text:list-item>
          <text:p text:style-name="P90" loext:marker-style-name="T11">Мессенджер Telegram. Используется как основная система коммуникации. Через него <text:soft-page-break/>разработчики передают модераторам ссылки на игры, получают замечания и отправляют инженерам команды на запуск игровых серверов.<text:span text:style-name="T11"/></text:p>
        </text:list-item>
        <text:list-item>
          <text:p text:style-name="P90" loext:marker-style-name="T11">GitHHub и скрипты CI/CD. Применяются инженером по эксплуатации для ручного конфигурирования пайплайнов сборки под каждую новую веб-игру.<text:span text:style-name="T11"/></text:p>
        </text:list-item>
        <text:list-item>
          <text:p text:style-name="P90" loext:marker-style-name="T11">Desktop-программа формирования отчетов. Изолированное настольное программное обеспечение, используемое менеджером для ежемесячной ручной выгрузки статистики из базы данных и отправки ее разработчикам.<text:span text:style-name="T11"/></text:p>
        </text:list-item>
        <text:list-item>
          <text:p text:style-name="P90" loext:marker-style-name="T11">Docker и Nginx. Используются для хостинга серверных экземпляров игр и раздачи статического контента игр.<text:span text:style-name="T11"/></text:p>
        </text:list-item>
      </text:list>
      <text:p text:style-name="P87">Для устранения выявленных недостатков спроектирована целевая модель бизнес-процесса, модель «TO-BE», <text:s/>представлена в приложении 2, в которой центральным механизмом исполнения наряду с модератором и разработчиком становится разрабатываемая автоматизированная платформа.<text:span text:style-name="T11"/></text:p>
      <text:p text:style-name="P87">Целевой процесс оптимизирован и сокращен до четырех этапов, исключающих ручное вмешательство в рутинные операции:<text:span text:style-name="T11"/></text:p>
      <text:list text:style-name="WW8Num12">
        <text:list-item>
          <text:p text:style-name="P91" loext:marker-style-name="T11">Подготовка тестового окружения. Разработчик самостоятельно загружает артефакты, а разрабатываемая платформа автоматически разворачивает тестовые версии веб-игры и сервера без участия инженера.<text:span text:style-name="T11"/></text:p>
        </text:list-item>
      </text:list>
      <text:list text:continue-list="list2092563204" text:style-name="WW8Num7">
        <text:list-item>
          <text:p text:style-name="P90" loext:marker-style-name="T11">Модерировать игровой проект. Модератор выносит вердикт непосредственно в интерфейсе платформы, опираясь на развернутую тестовую версию.<text:span text:style-name="T11"/></text:p>
        </text:list-item>
        <text:list-item>
          <text:p text:style-name="P90" loext:marker-style-name="T11">Управлять промышленной эксплуатацией. Разработчик получает возможность напрямую передавать команды управления сервером через платформу, автоматически переводя проект в статус доступного игрового сервера.<text:span text:style-name="T11"/></text:p>
        </text:list-item>
        <text:list-item>
          <text:p text:style-name="P90" loext:marker-style-name="T11">Мониторинг и генерация отчетности. Платформа в автоматическом режиме собирает статусы проектов и журналы серверов, генерируя аналитическую отчетность для разработчика.<text:span text:style-name="T11"/></text:p>
        </text:list-item>
      </text:list>
      <text:p text:style-name="P87">Таким образом, внедрение автоматизированной системы позволяет исключить из бизнес-процесса мессенджеры, стороннее ПО, а также роли инженера по эксплуатации и менеджера. Их функции полностью делегируются программным алгоритмам разрабатываемой платформы, что устраняет выявленные проблемные зоны.<text:span text:style-name="T11"/></text:p>
      <text:p text:style-name="P87">Для формализации функционального контекста системы разработана диаграмма вариантов использования, представленная в приложении 3. Модель определяет роли пользователей и их права доступа к подсистемам:<text:span text:style-name="T11"/></text:p>
      <text:list xml:id="list3087277987" text:style-name="WW8Num8">
        <text:list-item>
          <text:p text:style-name="P92" loext:marker-style-name="T11">Разработчик игры — основной пользователь, имеющий доступ к управлению проектами, взаимодействию во встроенномчате, настройке политик оркестрации и получению аналитики.<text:span text:style-name="T11"/></text:p>
        </text:list-item>
        <text:list-item>
          <text:p text:style-name="P92" loext:marker-style-name="T11"><text:soft-page-break/>Администратор — управляет созданием учетных записей модераторов.<text:span text:style-name="T11"/></text:p>
        </text:list-item>
        <text:list-item>
          <text:p text:style-name="P92" loext:marker-style-name="T11">Модератор — сотрудник платформы, работающий с очередью запросов. Выполняет проверку развернутых тестовых версий, выносит вердикты в встроенном чате.<text:span text:style-name="T11"/></text:p>
        </text:list-item>
        <text:list-item>
          <text:p text:style-name="P92" loext:marker-style-name="T11">Клиент игры — внешняя сущность, взаимодействующая с системой исключительно для получения адреса доступного игрового сервера.<text:span text:style-name="T11"/></text:p>
        </text:list-item>
      </text:list>
      <text:p text:style-name="P87">Для формализации структуры хранимых данных и связей между ними разработана инфологическая модель предметной области, представленная в приложении 4. Модель охватывает ключевые сущности платформы: учетные записи и сессии пользователей, игровые проекты и их метаданные, клиентские и серверные сборки, политики оркестрации, вычислительные узлы и разворачиваемые на них экземпляры серверов, а также сущности сквозной коммуникации (чаты и сообщения) и ежедневную статистику проектов.</text:p>
      <text:p text:style-name="P93">Ключевые связи модели отражают жизненный цикл игрового проекта: каждый проект однозначно связан с единственным набором метаданных, политикой оркестрации и сквозным чатом, при этом может иметь несколько версий клиентских и серверных сборок, а каждый развернутый на узле экземпляр сервера соответствует конкретной серверной сборке. Такая структура данных обеспечивает поддержку процессов модерации, автоматизированного развертывания и сбора аналитики по каждому проекту.<text:span text:style-name="T49"/></text:p>
      <text:list xml:id="list14438762589237" text:continue-list="list628324673" text:style-name="WW8Num4">
        <text:list-item>
          <text:list>
            <text:list-item>
              <text:h text:style-name="P94" text:outline-level="2" loext:marker-style-name="T11"><text:bookmark-start text:name="__RefHeading___Toc234097771"/>Обзор аналогичных решений<text:bookmark-end text:name="__RefHeading___Toc234097771"/><text:span text:style-name="T11"/></text:h>
            </text:list-item>
          </text:list>
        </text:list-item>
      </text:list>
      <text:p text:style-name="P87">Для обоснования необходимости разработки собственной автоматизированной системы был проведен анализ существующего рынка платформ дистрибуции веб-игр и порталов для разработчиков (Developer Consoles). Рынок предлагает различные подходы к организации рабочего пространства авторов, однако функциональность существующих систем имеет ряд ограничений в контексте решаемых задач.<text:span text:style-name="T11"/></text:p>
      <text:p text:style-name="P87">Ближайшим функциональным аналогом разрабатываемой системы является CrazyGames Developer Portal. Это платформа, позволяющая авторам публиковать и монетизировать HTML5-игры по модели самообслуживания <text:span text:style-name="T48">[1]</text:span>. Ключевые особенности системы:</text:p>
      <text:list text:continue-list="list3087277987" text:style-name="WW8Num8">
        <text:list-item>
          <text:p text:style-name="P92" loext:marker-style-name="T11">двухэтапная стратегия развертывания (тестовый запуск на ограниченную аудиторию и полноценный релиз);<text:span text:style-name="T11"/></text:p>
        </text:list-item>
        <text:list-item>
          <text:p text:style-name="P92" loext:marker-style-name="T11">расширенная панель аналитики с отслеживанием времени сессий и конверсии;<text:span text:style-name="T11"/></text:p>
        </text:list-item>
        <text:list-item>
          <text:p text:style-name="P92" loext:marker-style-name="T11">единый SDK для интеграции внутриигровой рекламы и мультиплеера.<text:span text:style-name="T11"/></text:p>
        </text:list-item>
      </text:list>
      <text:p text:style-name="P87">Несмотря на широкие возможности, процесс публикации имеет недостатки: коммуникация с модераторами ведется через внешние каналы связи (отсутствует встроенный чат), а также не предусмотрены инструменты для загрузки и оркестрации серверной части многопользовательских игр.<text:span text:style-name="T11"/></text:p>
      <text:p text:style-name="P87"><text:soft-page-break/>Платформа GameDistribution представляет собой крупную B2B-сеть дистрибуции веб-игр. Процесс работы выстроен вокруг однократной загрузки игры для последующего распространения по партнерским сайтам [<text:span text:style-name="T48">2</text:span>]. Ключевые особенности системы:</text:p>
      <text:list text:continue-numbering="true" text:style-name="WW8Num8">
        <text:list-item>
          <text:p text:style-name="P92" loext:marker-style-name="T11">отлаженный механизм загрузки ZIP-архивов;<text:span text:style-name="T11"/></text:p>
        </text:list-item>
        <text:list-item>
          <text:p text:style-name="P92" loext:marker-style-name="T11">готовая модель монетизации с поддержкой различных рекламных форматов;<text:span text:style-name="T11"/></text:p>
        </text:list-item>
        <text:list-item>
          <text:p text:style-name="P92" loext:marker-style-name="T11">формализованный процесс проверки качества (QA) командой портала.<text:span text:style-name="T11"/></text:p>
        </text:list-item>
      </text:list>
      <text:p text:style-name="P87">Главным недостатком является полная закрытость инфраструктуры. Кроме того, обратная связь по результатам модерации предоставляется исключительно по электронной почте, а хостинг собственных игровых серверов не поддерживается.<text:span text:style-name="T11"/></text:p>
      <text:p text:style-name="P87">Платформа Poki for Developers выделяется глубоким подходом к аналитике и тестированию игр [<text:span text:style-name="T48">3</text:span>]. Ключевые особенности системы:</text:p>
      <text:list text:continue-numbering="true" text:style-name="WW8Num8">
        <text:list-item>
          <text:p text:style-name="P92" loext:marker-style-name="T11">мощная аналитическая панель, отображающая ежедневную активную аудиторию (DAU), удержание и финансовые показатели;<text:span text:style-name="T11"/></text:p>
        </text:list-item>
        <text:list-item>
          <text:p text:style-name="P92" loext:marker-style-name="T11">предоставление бесплатных инструментов разработчика, включая библиотеки для сетевого взаимодействия;<text:span text:style-name="T11"/></text:p>
        </text:list-item>
        <text:list-item>
          <text:p text:style-name="P92" loext:marker-style-name="T53">экспертная поддержка на этапе тестирования.<text:span text:style-name="T53"/></text:p>
        </text:list-item>
      </text:list>
      <text:p text:style-name="P93"><text:span text:style-name="T53"><text:s/></text:span><text:span text:style-name="T11">Однако платформа функционирует по закрытой модели: доступ предоставляется только по предварительно одобренным заявкам. Система требует эксклюзивности размещения, что делает ее неприменимой в качестве массового открытого инструмента. Коммуникация с командой также вынесена за пределы портала.</text:span></text:p>
      <text:p text:style-name="P87">В сегменте инди-публикации стандартом является платформа itch.io. Ключевые особенности системы:<text:span text:style-name="T11"/></text:p>
      <text:list text:continue-numbering="true" text:style-name="WW8Num8">
        <text:list-item>
          <text:p text:style-name="P92" loext:marker-style-name="T11">полная свобода управления страницами проектов и загружаемыми файлами;<text:span text:style-name="T11"/></text:p>
        </text:list-item>
        <text:list-item>
          <text:p text:style-name="P92" loext:marker-style-name="T11">возможность частичного доступа к исходному коду пользовательских интерфейсов;<text:span text:style-name="T11"/></text:p>
        </text:list-item>
        <text:list-item>
          <text:p text:style-name="P92" loext:marker-style-name="T11">отсутствие строгих барьеров для входа начинающих разработчиков.<text:span text:style-name="T11"/></text:p>
        </text:list-item>
      </text:list>
      <text:p text:style-name="P87">Основной проблемой платформы является отсутствие B2B-модерации с утверждением вердиктов администрацией. Встроенная аналитика ограничивается базовыми просмотрами и скачиваниями, игнорируя метрики вовлеченности и рекламной монетизации. Поддержка управления серверными экземплярами полностью отсутствует [<text:span text:style-name="T48">4</text:span>].</text:p>
      <text:p text:style-name="P87">В качестве альтернативного подхода была рассмотрена система CloudArcade — специализированная система управления контентом (CMS) для создания игровых порталов. Ключевые особенности системы:<text:span text:style-name="T11"/></text:p>
      <text:list xml:id="list14437103592441" text:continue-numbering="true" text:style-name="WW8Num8">
        <text:list-item>
          <text:p text:style-name="P92" loext:marker-style-name="T11">полностью открытый исходный код, допускающий глубокую кастомизацию;<text:span text:style-name="T11"/></text:p>
        </text:list-item>
        <text:list-item>
          <text:p text:style-name="P92" loext:marker-style-name="T11">возможность развертывания на собственных серверах предприятия;<text:span text:style-name="T11"/></text:p>
        </text:list-item>
        <text:list-item>
          <text:p text:style-name="P92" loext:marker-style-name="T53">легкая расширяемая архитектура на базе плагинов.<text:span text:style-name="T53"/></text:p>
        </text:list-item>
      </text:list>
      <text:p text:style-name="P93"><text:soft-page-break/><text:span text:style-name="T53"><text:s/></text:span><text:span text:style-name="T11">Существенным ограничением является целевая аудитория системы: она спроектирована для администраторов порталов, а не для предоставления консоли внешним разработчикам. Процесс публикации осуществляется администратором вручную, встроенный чат и расширенная статистика отсутствуют [</text:span><text:span text:style-name="T54">5</text:span><text:span text:style-name="T11">].</text:span></text:p>
      <text:p text:style-name="P95">Для наглядности результаты исследования ключевых функций сведены в таблицу 1<text:span text:style-name="T51">.</text:span><text:span text:style-name="T55"/></text:p>
      <text:p text:style-name="P96">Таблица 1.1. Сравнение функциональных возможностей аналогичных решений<text:span text:style-name="T56"/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row table:style-name="Таблица6.1">
          <table:table-cell table:style-name="Таблица6.A1" office:value-type="string">
            <text:p text:style-name="P97">№</text:p>
          </table:table-cell>
          <table:table-cell table:style-name="Таблица6.A1" office:value-type="string">
            <text:p text:style-name="P97">Функция</text:p>
          </table:table-cell>
          <table:table-cell table:style-name="Таблица6.A1" office:value-type="string">
            <text:p text:style-name="P97">Game Distribution</text:p>
          </table:table-cell>
          <table:table-cell table:style-name="Таблица6.A1" office:value-type="string">
            <text:p text:style-name="P97">Crazy Games</text:p>
          </table:table-cell>
          <table:table-cell table:style-name="Таблица6.E1" office:value-type="string">
            <text:p text:style-name="P97">Poki for Devs</text:p>
          </table:table-cell>
          <table:table-cell table:style-name="Таблица6.E1" office:value-type="string">
            <text:p text:style-name="P97">itch.io</text:p>
          </table:table-cell>
          <table:table-cell table:style-name="Таблица6.A1" office:value-type="string">
            <text:p text:style-name="P97">Cloud Arcade</text:p>
          </table:table-cell>
        </table:table-row>
        <table:table-row table:style-name="Таблица6.2">
          <table:table-cell table:style-name="Таблица6.A2" office:value-type="string">
            <text:p text:style-name="P98">1</text:p>
          </table:table-cell>
          <table:table-cell table:style-name="Таблица6.A2" office:value-type="string">
            <text:p text:style-name="P7">Самостоятельная публикация</text:p>
          </table:table-cell>
          <table:table-cell table:style-name="Таблица6.A2" office:value-type="string">
            <text:p text:style-name="P97">+</text:p>
          </table:table-cell>
          <table:table-cell table:style-name="Таблица6.A2" office:value-type="string">
            <text:p text:style-name="P97">+</text:p>
          </table:table-cell>
          <table:table-cell table:style-name="Таблица6.E2" office:value-type="string">
            <text:p text:style-name="P97">-</text:p>
          </table:table-cell>
          <table:table-cell table:style-name="Таблица6.E2" office:value-type="string">
            <text:p text:style-name="P97">+</text:p>
          </table:table-cell>
          <table:table-cell table:style-name="Таблица6.A2" office:value-type="string">
            <text:p text:style-name="P97">-</text:p>
          </table:table-cell>
        </table:table-row>
        <table:table-row table:style-name="Таблица6.2">
          <table:table-cell table:style-name="Таблица6.A2" office:value-type="string">
            <text:p text:style-name="P98">2</text:p>
          </table:table-cell>
          <table:table-cell table:style-name="Таблица6.A2" office:value-type="string">
            <text:p text:style-name="P99">Многоэтапная модерация проектов</text:p>
          </table:table-cell>
          <table:table-cell table:style-name="Таблица6.A2" office:value-type="string">
            <text:p text:style-name="P97">-</text:p>
          </table:table-cell>
          <table:table-cell table:style-name="Таблица6.A2" office:value-type="string">
            <text:p text:style-name="P97">+</text:p>
          </table:table-cell>
          <table:table-cell table:style-name="Таблица6.E2" office:value-type="string">
            <text:p text:style-name="P97">+</text:p>
          </table:table-cell>
          <table:table-cell table:style-name="Таблица6.E2" office:value-type="string">
            <text:p text:style-name="P97">-</text:p>
          </table:table-cell>
          <table:table-cell table:style-name="Таблица6.A2" office:value-type="string">
            <text:p text:style-name="P97">-</text:p>
          </table:table-cell>
        </table:table-row>
        <table:table-row table:style-name="Таблица6.4">
          <table:table-cell table:style-name="Таблица6.A2" office:value-type="string">
            <text:p text:style-name="P100">3</text:p>
          </table:table-cell>
          <table:table-cell table:style-name="Таблица6.A2" office:value-type="string">
            <text:p text:style-name="P101">Встроенный сквозной чат с модератором </text:p>
          </table:table-cell>
          <table:table-cell table:style-name="Таблица6.A2" office:value-type="string">
            <text:p text:style-name="P102">-</text:p>
          </table:table-cell>
          <table:table-cell table:style-name="Таблица6.A2" office:value-type="string">
            <text:p text:style-name="P102">-</text:p>
          </table:table-cell>
          <table:table-cell table:style-name="Таблица6.E2" office:value-type="string">
            <text:p text:style-name="P102">-</text:p>
          </table:table-cell>
          <table:table-cell table:style-name="Таблица6.E2" office:value-type="string">
            <text:p text:style-name="P102">-</text:p>
          </table:table-cell>
          <table:table-cell table:style-name="Таблица6.A2" office:value-type="string">
            <text:p text:style-name="P102">-</text:p>
          </table:table-cell>
        </table:table-row>
        <table:table-row table:style-name="Таблица6.5">
          <table:table-cell table:style-name="Таблица6.A2" office:value-type="string">
            <text:p text:style-name="P100">4</text:p>
          </table:table-cell>
          <table:table-cell table:style-name="Таблица6.A2" office:value-type="string">
            <text:p text:style-name="P103">Сбор показателей монетезации</text:p>
          </table:table-cell>
          <table:table-cell table:style-name="Таблица6.A2" office:value-type="string">
            <text:p text:style-name="P102">+</text:p>
          </table:table-cell>
          <table:table-cell table:style-name="Таблица6.A2" office:value-type="string">
            <text:p text:style-name="P102">+</text:p>
          </table:table-cell>
          <table:table-cell table:style-name="Таблица6.E2" office:value-type="string">
            <text:p text:style-name="P102">+</text:p>
          </table:table-cell>
          <table:table-cell table:style-name="Таблица6.E2" office:value-type="string">
            <text:p text:style-name="P102">-</text:p>
          </table:table-cell>
          <table:table-cell table:style-name="Таблица6.A2" office:value-type="string">
            <text:p text:style-name="P102">-</text:p>
          </table:table-cell>
        </table:table-row>
        <table:table-row table:style-name="Таблица6.6">
          <table:table-cell table:style-name="Таблица6.A2" office:value-type="string">
            <text:p text:style-name="P100">5</text:p>
          </table:table-cell>
          <table:table-cell table:style-name="Таблица6.A2" office:value-type="string">
            <text:p text:style-name="P103">Отслеживание игровых метрик</text:p>
          </table:table-cell>
          <table:table-cell table:style-name="Таблица6.A2" office:value-type="string">
            <text:p text:style-name="P102">-</text:p>
          </table:table-cell>
          <table:table-cell table:style-name="Таблица6.A2" office:value-type="string">
            <text:p text:style-name="P102">+</text:p>
          </table:table-cell>
          <table:table-cell table:style-name="Таблица6.E2" office:value-type="string">
            <text:p text:style-name="P102">+</text:p>
          </table:table-cell>
          <table:table-cell table:style-name="Таблица6.E2" office:value-type="string">
            <text:p text:style-name="P102">-</text:p>
          </table:table-cell>
          <table:table-cell table:style-name="Таблица6.A2" office:value-type="string">
            <text:p text:style-name="P102">-</text:p>
          </table:table-cell>
        </table:table-row>
        <table:table-row table:style-name="Таблица6.7">
          <table:table-cell table:style-name="Таблица6.A2" office:value-type="string">
            <text:p text:style-name="P100">6</text:p>
          </table:table-cell>
          <table:table-cell table:style-name="Таблица6.A2" office:value-type="string">
            <text:p text:style-name="P103">Управление игровыми серверами </text:p>
          </table:table-cell>
          <table:table-cell table:style-name="Таблица6.A2" office:value-type="string">
            <text:p text:style-name="P102">-</text:p>
          </table:table-cell>
          <table:table-cell table:style-name="Таблица6.A2" office:value-type="string">
            <text:p text:style-name="P102">-</text:p>
          </table:table-cell>
          <table:table-cell table:style-name="Таблица6.E2" office:value-type="string">
            <text:p text:style-name="P102">-</text:p>
          </table:table-cell>
          <table:table-cell table:style-name="Таблица6.E2" office:value-type="string">
            <text:p text:style-name="P102">-</text:p>
          </table:table-cell>
          <table:table-cell table:style-name="Таблица6.A2" office:value-type="string">
            <text:p text:style-name="P102">-</text:p>
          </table:table-cell>
        </table:table-row>
        <table:table-row table:style-name="Таблица6.8">
          <table:table-cell table:style-name="Таблица6.A2" office:value-type="string">
            <text:p text:style-name="P98">7</text:p>
          </table:table-cell>
          <table:table-cell table:style-name="Таблица6.A2" office:value-type="string">
            <text:p text:style-name="P99">Развертывание на собственной инфраструктуре</text:p>
          </table:table-cell>
          <table:table-cell table:style-name="Таблица6.A2" office:value-type="string">
            <text:p text:style-name="P97">-</text:p>
          </table:table-cell>
          <table:table-cell table:style-name="Таблица6.A2" office:value-type="string">
            <text:p text:style-name="P97">-</text:p>
          </table:table-cell>
          <table:table-cell table:style-name="Таблица6.E2" office:value-type="string">
            <text:p text:style-name="P97">-</text:p>
          </table:table-cell>
          <table:table-cell table:style-name="Таблица6.E2" office:value-type="string">
            <text:p text:style-name="P97">+/-</text:p>
          </table:table-cell>
          <table:table-cell table:style-name="Таблица6.A2" office:value-type="string">
            <text:p text:style-name="Standard">+</text:p>
          </table:table-cell>
        </table:table-row>
      </table:table>
      <text:p text:style-name="P104">Проведенный анализ показывает, что ни одно из существующих на рынке решений не удовлетворяет заявленным требованиям в полной мере. Основным уникальным преимуществом разрабатываемой системы является, прозрачной модерации и технической оркестрации инфраструктуры игровых серверов в рамках единого рабочего пространства. Это обосновывает необходимость отказа от использования готовых продуктов и перехода к проектированию собственной платформы.<text:span text:style-name="T49"/></text:p>
      <text:list text:continue-list="list14438762589237" text:style-name="WW8Num4">
        <text:list-item>
          <text:list>
            <text:list-item>
              <text:h text:style-name="P105" text:outline-level="2" loext:marker-style-name="T11"><text:bookmark-start text:name="__RefHeading___Toc8445_3300070494"/><text:span text:style-name="T49">Цел</text:span><text:span text:style-name="T57">ь</text:span><text:span text:style-name="T49"> и задачи</text:span><text:bookmark-end text:name="__RefHeading___Toc8445_3300070494"/></text:h>
            </text:list-item>
          </text:list>
        </text:list-item>
      </text:list>
      <text:p text:style-name="P106">Цель разработки и внедрения автоматизированной системы «Центр разработчиков» — повышение эффективности процесса публикации и сопровождения веб-игр на игровой платформе Welwise Games за счет автоматизации рутинных операций и создания единого рабочего пространства для разработчиков.<text:span text:style-name="T11"/></text:p>
      <text:p text:style-name="P106"><text:soft-page-break/>Достижение общей цели обеспечивается положительной динамикой следующих ключевых показателей:<text:span text:style-name="T11"/></text:p>
      <text:list text:continue-list="list14437103592441" text:style-name="WW8Num8">
        <text:list-item>
          <text:p text:style-name="P92" loext:marker-style-name="T11">Производственно-экономические: сокращение трудозатрат и времени на выполнение операций по публикации игр, а также уменьшение затрат на административно-управленческий и инженерный аппарат за счет исключения ручного обслуживания каждого проекта.<text:span text:style-name="T11"/></text:p>
        </text:list-item>
        <text:list-item>
          <text:p text:style-name="P92" loext:marker-style-name="T11">Технологические: оптимизация схем бизнес-процессов, внедрение новых технологий автоматизированного развертывания (CI/CD) и самостоятельной оркестрации серверной инфраструктуры многопользовательских игр.<text:span text:style-name="T11"/></text:p>
        </text:list-item>
        <text:list-item>
          <text:p text:style-name="P92" loext:marker-style-name="T11">Организационные и другие: повышение качества и оперативности предоставления аналитической информации, улучшение уровня обслуживания клиентов (разработчиков) платформы, а также повышение прозрачности процессов за счет централизованной коммуникации.<text:span text:style-name="T11"/></text:p>
        </text:list-item>
      </text:list>
      <text:p text:style-name="P106">Критериями оценки успешности достижения целей выступают следующие измеримые показатели:<text:span text:style-name="T11"/></text:p>
      <text:list text:continue-numbering="true" text:style-name="WW8Num8">
        <text:list-item>
          <text:p text:style-name="P92" loext:marker-style-name="T11">Сокращение времени подготовки черновика и развертывания игры в dev-окружении с текущих 9 дней до 1–2 часов.<text:span text:style-name="T11"/></text:p>
        </text:list-item>
        <text:list-item>
          <text:p text:style-name="P92" loext:marker-style-name="T11">Уменьшение длительности этапа тестирования и модерации с 5 дней до 1–2 дней благодаря внедрению сквозного чата.<text:span text:style-name="T11"/></text:p>
        </text:list-item>
        <text:list-item>
          <text:p text:style-name="P92" loext:marker-style-name="T11">Снижение до нуля количества ручных обращений разработчиков к инженерам по эксплуатации для выполнения базовых задач управления серверами.<text:span text:style-name="T11"/></text:p>
        </text:list-item>
        <text:list-item>
          <text:p text:style-name="P92" loext:marker-style-name="T11">Обеспечение посуточного доступа к аналитической отчетности взамен ручного формирования отчетов менеджером один раз в месяц.<text:span text:style-name="T11"/></text:p>
        </text:list-item>
      </text:list>
      <text:p text:style-name="P106">Для достижения поставленной цели в рамках работы необходимо решить следующие задачи:<text:span text:style-name="T11"/></text:p>
      <text:list text:style-name="WW8Num10">
        <text:list-item>
          <text:p text:style-name="P107" loext:marker-style-name="T11">Провести анализ предметной области и обследование существующих бизнес-процессов платформы Welwise Games.<text:span text:style-name="T11"/></text:p>
        </text:list-item>
        <text:list-item>
          <text:p text:style-name="P107" loext:marker-style-name="T11">Осуществить постановку технического задания на разработку автоматизированной системы.<text:span text:style-name="T11"/></text:p>
        </text:list-item>
        <text:list-item>
          <text:p text:style-name="P107" loext:marker-style-name="T11">Создать проектную документацию, включая проектирование программной архитектуры и разработку схемы базы данных.<text:span text:style-name="T11"/></text:p>
        </text:list-item>
        <text:list-item>
          <text:p text:style-name="P107" loext:marker-style-name="T11">Выполнить разработку программного продукта, включая подсистемы управления проектами, развертывания, модерации, оркестрации серверов и аналитики.<text:span text:style-name="T11"/></text:p>
        </text:list-item>
        <text:list-item>
          <text:p text:style-name="P107" loext:marker-style-name="T11">Провести предварительные испытания, тестирование и отладку конечного продукта.<text:span text:style-name="T11"/></text:p>
        </text:list-item>
        <text:list-item>
          <text:p text:style-name="P107" loext:marker-style-name="T49">Выполнить развертывание автоматизированной системы на серверах заказчика и провести опытную эксплуатацию.<text:span text:style-name="T49"/></text:p>
        </text:list-item>
      </text:list>
      <text:h text:style-name="P108" text:outline-level="1"><text:bookmark-start text:name="__RefHeading___Toc1224_44559829"/>ЗАКЛЮЧЕНИЕ<text:bookmark-end text:name="__RefHeading___Toc1224_44559829"/><text:span text:style-name="T11"/></text:h>
      <text:p text:style-name="P76">В ходе выполнения работы был проведен комплексный анализ деятельности игровой платформы Welwise Games и исследованы существующие бизнес-процессы публикации веб-игр. Выявлено, что применяемая ручная модель управления проектами обладает низкой масштабируемостью и требует постоянного участия инженеров по эксплуатации, что сдерживает развитие площадки и увеличивает время вывода новых продуктов на рынок. <text:s/><text:span text:style-name="T11"/></text:p>
      <text:p text:style-name="P76">Для решения выявленных проблем было разработано техническое задание на создание автоматизированной системы «Центр разработчиков» и спроектирована целевая модель бизнес-процессов. Внедрение спроектированного программного комплекса позволит радикально сократить время развертывания новых игр с 9 дней до 1–2 часов, оптимизировать модерацию за счет встроенного сквозного чата и предоставить авторам автономный инструмент для самостоятельного управления серверной инфраструктурой. </text:p>
      <text:p text:style-name="Standard"/>
      <text:h text:style-name="P109" text:outline-level="1"><text:bookmark-start text:name="__RefHeading___Toc1226_44559829"/>СПИСОК ИСПОЛЬЗОВАННЫХ ИСТОЧНИКОВ<text:bookmark-end text:name="__RefHeading___Toc1226_44559829"/></text:h>
      <text:list text:style-name="WW8Num9">
        <text:list-item>
          <text:p text:style-name="P110">CrazyGames Developer Portal – [Электронный ресурс] режим доступа: <text:a xlink:type="simple" xlink:href="https://developer.crazygames.com/" text:style-name="Internet_20_link" text:visited-style-name="Visited_20_Internet_20_Link"><text:span text:style-name="Internet_20_link">https://developer.crazygames.com/</text:span></text:a> (09.07.2026). </text:p>
        </text:list-item>
        <text:list-item>
          <text:p text:style-name="P111">GameDistribution – [Электронный ресурс] режим доступа: <text:a xlink:type="simple" xlink:href="https://gamedistribution.com/" text:style-name="Internet_20_link" text:visited-style-name="Visited_20_Internet_20_Link"><text:span text:style-name="Internet_20_link">https://gamedistribution.com/</text:span></text:a> (09.07.2026). </text:p>
        </text:list-item>
        <text:list-item>
          <text:p text:style-name="P111">Poki for Developers – [Электронный ресурс] режим доступа: <text:a xlink:type="simple" xlink:href="https://developers.poki.com/" text:style-name="Internet_20_link" text:visited-style-name="Visited_20_Internet_20_Link"><text:span text:style-name="Internet_20_link">https://developers.poki.com/</text:span></text:a> (09.07.2026). </text:p>
        </text:list-item>
        <text:list-item>
          <text:p text:style-name="P111">itch.io – [Электронный ресурс] режим доступа: <text:a xlink:type="simple" xlink:href="https://itch.io/developers" text:style-name="Internet_20_link" text:visited-style-name="Visited_20_Internet_20_Link"><text:span text:style-name="Internet_20_link">https://itch.io/developers</text:span></text:a> (09.07.2026). </text:p>
        </text:list-item>
        <text:list-item>
          <text:p text:style-name="P111">CloudArcade – HTML5 / Web Game Portal CMS – [Электронный ресурс] режим доступа: <text:a xlink:type="simple" xlink:href="https://cloudarcade.net/" text:style-name="Internet_20_link" text:visited-style-name="Visited_20_Internet_20_Link"><text:span text:style-name="Internet_20_link">https://cloudarcade.net/</text:span></text:a> (09.07.2026). </text:p>
        </text:list-item>
        <text:list-item>
          <text:p text:style-name="P111">Отчет The 2026 State Of Web Gaming зафиксировал рост популярности браузерных игр | Playground.ru – [Электронный ресурс] режим доступа: <text:a xlink:type="simple" xlink:href="https://www.playground.ru/misc/news/otchet_the_2026_state_of_web_gaming_zafiksiroval_rost_populyarnosti_brauzernyh_igr-1855060" text:style-name="Internet_20_link" text:visited-style-name="Visited_20_Internet_20_Link"><text:span text:style-name="Internet_20_link">https://www.playground.ru/misc/news/otchet_the_2026_state_of_web_gaming_zafiksiroval_rost_populyarnosti_brauzernyh_igr-1855060</text:span></text:a> (09.07.2026).</text:p>
        </text:list-item>
      </text:list>
      <text:p text:style-name="P112"/>
      <text:h text:style-name="P113" text:outline-level="1"><text:bookmark-start text:name="__RefHeading___Toc1228_44559829"/>Приложение 1<text:bookmark-end text:name="__RefHeading___Toc1228_44559829"/><text:span text:style-name="T58"/></text:h>
      <text:p text:style-name="P114"><text:span text:style-name="T48">Модель </text:span>AS-IS</text:p>
      <text:p text:style-name="P115"><draw:frame draw:style-name="fr3" draw:name="Изображение5" text:anchor-type="as-char" svg:width="8.142cm" svg:height="22.456cm" draw:z-index="1"><draw:image xlink:href="Pictures/1000000100000175000003FB4D5DA3E9.png" xlink:type="simple" xlink:show="embed" xlink:actuate="onLoad" draw:mime-type="image/png"/></draw:frame></text:p>
      <text:p text:style-name="P116">Рисунок П.1. <text:span text:style-name="T48">Д</text:span>иаграмма декомпозиции IDEF0 </text:p>
      <text:h text:style-name="P113" text:outline-level="1"><text:bookmark-start text:name="__RefHeading___Toc1230_44559829"/>Приложение 2<text:bookmark-end text:name="__RefHeading___Toc1230_44559829"/><text:span text:style-name="T58"/></text:h>
      <text:p text:style-name="P114">Диаграмма TO-BE</text:p>
      <text:p text:style-name="P115"><draw:frame draw:style-name="fr4" draw:name="Изображение6" text:anchor-type="as-char" svg:width="8.428cm" svg:height="22.643cm" draw:z-index="2"><draw:image xlink:href="Pictures/1000000100000173000003F8C7C72039.png" xlink:type="simple" xlink:show="embed" xlink:actuate="onLoad" draw:mime-type="image/png"/></draw:frame></text:p>
      <text:p text:style-name="P116">Рисунок П.2 <text:span text:style-name="T48">Д</text:span>иаграмма декомпозиции IDEF0 </text:p>
      <text:h text:style-name="P113" text:outline-level="1"><text:bookmark-start text:name="__RefHeading___Toc1232_44559829"/>Приложение 3<text:bookmark-end text:name="__RefHeading___Toc1232_44559829"/><text:span text:style-name="T58"/></text:h>
      <text:p text:style-name="P114">Диаграмма вариантов использования</text:p>
      <text:p text:style-name="P116"><draw:frame draw:style-name="fr5" draw:name="Изображение2" text:anchor-type="char" svg:width="17.447cm" svg:height="22.401cm" draw:z-index="4"><draw:image xlink:href="Pictures/10000001000003DE000004F71DD1E489.png" xlink:type="simple" xlink:show="embed" xlink:actuate="onLoad" draw:mime-type="image/png"/></draw:frame>Рисунок П.3 <text:span text:style-name="T48">Диаграмма вариантов использования UML</text:span></text:p>
      <text:p text:style-name="P116"/>
      <text:h text:style-name="P113" text:outline-level="1"><text:bookmark-start text:name="__RefHeading___Toc1234_44559829"/>Приложение 4<text:bookmark-end text:name="__RefHeading___Toc1234_44559829"/></text:h>
      <text:p text:style-name="P117">Инфологическая модель</text:p>
      <text:p text:style-name="P116"><draw:frame draw:style-name="fr6" draw:name="Изображение3" text:anchor-type="char" svg:x="3.612cm" svg:y="-0.568cm" svg:width="9.934cm" svg:height="22.611cm" draw:z-index="5"><draw:image xlink:href="Pictures/10000001000001D50000042BAB76782B.png" xlink:type="simple" xlink:show="embed" xlink:actuate="onLoad" draw:mime-type="image/png"/></draw:frame>Рисунок П.4. <text:span text:style-name="T48">Диаграмма сущность-связь UM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Devanagari3" svg:font-family="'Noto Sans Devanagari', Calibri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" svg:font-family="Ti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0" fo:widows="0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3" style:font-family-complex="'Noto Sans Devanagari', Calibri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0cm" fo:margin-right="0cm" fo:margin-top="0cm" fo:margin-bottom="0.64cm" style:contextual-spacing="false" fo:line-height="100%" fo:text-align="center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letter-kerning="true" style:font-name-asian="Ti" style:font-family-asian="Ti" style:font-size-asian="12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left="0cm" fo:margin-right="0cm" fo:margin-top="0cm" fo:margin-bottom="0.499cm" style:contextual-spacing="false" fo:line-height="100%" fo:text-indent="1cm" style:auto-text-indent="false" fo:keep-with-next="always"/>
      <style:text-properties style:font-name="Times New Roman" fo:font-family="'Times New Roman'" style:font-family-generic="roman" style:font-pitch="variable" fo:font-size="12pt" fo:font-style="normal" fo:font-weight="bold" style:font-name-asian="Times New Roman" style:font-family-asian="'Times New Roman'" style:font-family-generic-asian="roman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247cm" fo:margin-bottom="0.212cm" style:contextual-spacing="false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Заголовок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3" style:font-family-complex="'Noto Sans Devanagari', Calibri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, Arial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Noto Sans Devanagari3" style:font-family-complex="'Noto Sans Devanagari', Calibri" style:font-pitch-complex="variable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3" style:font-family-complex="'Noto Sans Devanagari', Calibri" style:font-pitch-complex="variable" style:font-size-complex="12pt" style:font-style-complex="italic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3" style:font-family-complex="'Noto Sans Devanagari', Calibri" style:font-pitch-complex="variable" style:font-size-complex="14pt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3" style:font-family-complex="'Noto Sans Devanagari', Calibri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Noto Sans Devanagari3" style:font-family-complex="'Noto Sans Devanagari', Calibri" style:font-pitch-complex="variable"/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Колонтитул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Схема_20_документа1" style:display-name="Схема документа1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Body_20_Text_20_Indent_20_2" style:display-name="Body Text Indent 2" style:family="paragraph" style:parent-style-name="Standard">
      <style:paragraph-properties fo:margin-left="0cm" fo:margin-right="-0.002cm" fo:line-height="200%" fo:text-align="left" style:justify-single-word="false" fo:text-indent="1.27cm" style:auto-text-indent="false"/>
      <style:text-properties fo:font-size="14pt" style:font-name-asian="Times New Roman" style:font-family-asian="'Times New Roman'" style:font-family-generic-asian="roman" style:font-pitch-asian="variable" style:font-size-asian="14pt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false" fo:line-height="115%" fo:text-align="left" style:justify-single-word="false" fo:orphans="2" fo:widows="2" fo:text-indent="0cm" style:auto-text-indent="false"/>
      <style:text-properties fo:font-size="10pt" fo:language="none" fo:country="none" style:font-name-asian="Times New Roman" style:font-family-asian="'Times New Roman'" style:font-family-generic-asian="roman" style:font-pitch-asian="variable" style:font-size-asian="10pt" style:font-size-complex="10pt"/>
    </style:style>
    <style:style style:name="Footnote" style:family="paragraph" style:parent-style-name="Standard" style:class="extra">
      <style:text-properties fo:font-size="10pt" fo:language="none" fo:country="none" style:font-size-asian="10pt" style:font-size-complex="10pt"/>
    </style:style>
    <style:style style:name="Текст_20_примечания1" style:display-name="Текст примечания1" style:family="paragraph" style:parent-style-name="Standard">
      <style:text-properties fo:font-size="10pt" fo:language="none" fo:country="none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1" style:next-style-name="Текст_20_примечания1">
      <style:text-properties fo:font-weight="bold" style:font-weight-asian="bold" style:font-weight-complex="bold"/>
    </style:style>
    <style:style style:name="_31_11text" style:display-name="111text" style:family="paragraph" style:parent-style-name="Standard">
      <loext:graphic-properties draw:fill="solid" draw:fill-color="#ffffff"/>
      <style:paragraph-properties fo:margin-left="0cm" fo:margin-right="0cm" fo:text-indent="1.251cm" style:auto-text-indent="false" fo:background-color="#ffffff" style:text-autospace="none"/>
      <style:text-properties fo:letter-spacing="0.007cm" style:font-name-asian="Times New Roman" style:font-family-asian="'Times New Roman'" style:font-family-generic-asian="roman" style:font-pitch-asian="variable" style:font-size-complex="14pt"/>
    </style:style>
    <style:style style:name="Table_20_Paragraph" style:display-name="Table Paragraph" style:family="paragraph" style:parent-style-name="Standard">
      <style:paragraph-properties fo:line-height="100%" fo:text-align="left" style:justify-single-word="false" style:text-autospace="none"/>
      <style:text-properties fo:font-size="11pt" style:font-name-asian="Times New Roman" style:font-family-asian="'Times New Roman'" style:font-family-generic-asian="roman" style:font-pitch-asian="variable" style:font-size-asian="11pt"/>
    </style:style>
    <style:style style:name="Table_20_Contents_20__28_user_29_" style:display-name="Table Contents (user)" style:family="paragraph" style:parent-style-name="Standard">
      <style:paragraph-properties fo:orphans="0" fo:widows="0"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Указатель1" style:class="index">
      <style:paragraph-properties fo:margin-left="1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Перечень_20_рисунков" style:display-name="Перечень рисунков" style:family="paragraph" style:parent-style-name="caption11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Основной_20_шрифт_20_абзаца" style:display-name="Основной шрифт абзаца" style:family="text"/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0" style:family="text"/>
    <style:style style:name="WW8Num3z1" style:family="text"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/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ой_20_шрифт_20_абзаца1" style:display-name="Основной шрифт абзаца1" style:family="text"/>
    <style:style style:name="Page_20_Number" style:display-name="Page Number" style:family="text" style:parent-style-name="Основной_20_шрифт_20_абзаца1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16pt" fo:font-weight="bold" style:letter-kerning="true" style:font-name-asian="Calibri" style:font-family-asian="Calibri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Абзац_20_списка_20_Знак" style:display-name="Абзац списка Знак" style:family="text"/>
    <style:style style:name="Текст_20_сноски_20_Знак" style:display-name="Текст сноски Знак" style:family="text">
      <style:text-properties style:font-name-asian="Calibri" style:font-family-asian="Calibri" style:font-family-generic-asian="swiss" style:font-pitch-asian="variable"/>
    </style:style>
    <style:style style:name="Footnote_20_Characters" style:display-name="Footnote Characters" style:family="text">
      <style:text-properties style:text-position="super 58%"/>
    </style:style>
    <style:style style:name="Знак_20_примечания1" style:display-name="Знак примечания1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-asian="Calibri" style:font-family-asian="Calibri" style:font-family-generic-asian="swiss" style:font-pitch-asian="variable"/>
    </style:style>
    <style:style style:name="Тема_20_примечания_20_Знак" style:display-name="Тема примечания Знак" style:family="text">
      <style:text-properties fo:font-weight="bold" style:font-name-asian="Calibri" style:font-family-asian="Calibri" style:font-family-generic-asian="swiss" style:font-pitch-asian="variable" style:font-weight-asian="bold" style:font-weight-complex="bold"/>
    </style:style>
    <style:style style:name="Index_20_Link_20__28_user_29_" style:display-name="Index Link (user)" style:family="text"/>
    <style:style style:name="Numbering_20_Symbols_20__28_user_29_" style:display-name="Numbering Symbols (user)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margin-left="0.75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margin-left="0.75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margin-left="0.499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8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498cm" fo:text-indent="-0.635cm" fo:margin-left="3.498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4.133cm" fo:text-indent="-0.635cm" fo:margin-left="4.13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768cm" fo:text-indent="-0.635cm" fo:margin-left="4.76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403cm" fo:text-indent="-0.635cm" fo:margin-left="5.40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6.038cm" fo:text-indent="-0.635cm" fo:margin-left="6.038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673cm" fo:text-indent="-0.635cm" fo:margin-left="6.67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7.308cm" fo:text-indent="-0.635cm" fo:margin-left="7.308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943cm" fo:text-indent="-0.635cm" fo:margin-left="7.9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7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814cm" fo:text-indent="-0.635cm" fo:margin-left="7.8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space" fo:text-indent="-0.635cm" fo:margin-left="2.445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08cm" fo:text-indent="-0.635cm" fo:margin-left="3.08cm"/>
        </style:list-level-properties>
        <style:text-properties style:font-name="OpenSymbol1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15cm" fo:text-indent="-0.635cm" fo:margin-left="3.715cm"/>
        </style:list-level-properties>
        <style:text-properties style:font-name="OpenSymbol1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35cm" fo:text-indent="-0.635cm" fo:margin-left="4.3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985cm" fo:text-indent="-0.635cm" fo:margin-left="4.985cm"/>
        </style:list-level-properties>
        <style:text-properties style:font-name="OpenSymbol1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2cm" fo:text-indent="-0.635cm" fo:margin-left="5.62cm"/>
        </style:list-level-properties>
        <style:text-properties style:font-name="OpenSymbol1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6.255cm" fo:text-indent="-0.635cm" fo:margin-left="6.255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89cm" fo:text-indent="-0.635cm" fo:margin-left="6.89cm"/>
        </style:list-level-properties>
        <style:text-properties style:font-name="OpenSymbol1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525cm" fo:text-indent="-0.635cm" fo:margin-left="7.52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801cm" fo:text-indent="-0.55cm" fo:margin-left="1.80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7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814cm" fo:text-indent="-0.635cm" fo:margin-left="7.8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7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814cm" fo:text-indent="-0.635cm" fo:margin-left="7.8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text-properties fo:font-size="10pt" fo:font-style="italic" style:text-underline-style="solid" style:text-underline-width="auto" style:text-underline-color="font-color" style:letter-kerning="true" style:font-size-asian="10pt" style:font-style-asian="italic" style:font-size-complex="10pt"/>
    </style:style>
    <style:style style:name="MP3" style:family="paragraph" style:parent-style-name="Header">
      <style:paragraph-properties fo:text-align="center" style:justify-single-word="false"/>
      <style:text-properties fo:font-size="1pt" fo:font-style="italic" style:text-underline-style="solid" style:text-underline-width="auto" style:text-underline-color="font-color" style:letter-kerning="true" style:font-size-asian="1pt" style:font-style-asian="italic" style:font-size-complex="1pt"/>
    </style:style>
    <style:style style:name="MT1" style:family="text">
      <style:text-properties fo:font-size="11pt" style:font-size-asian="11pt"/>
    </style:style>
    <style:style style:name="MT2" style:family="text">
      <style:text-properties fo:font-size="1pt" fo:font-style="italic" style:text-underline-style="solid" style:text-underline-width="auto" style:text-underline-color="font-color" style:letter-kerning="true" style:font-size-asian="1pt" style:font-style-asian="italic" style:font-size-complex="1pt"/>
    </style:style>
    <style:page-layout style:name="Mpm1">
      <style:page-layout-properties fo:page-width="21.001cm" fo:page-height="29.7cm" style:num-format="1" style:print-orientation="portrait" fo:margin-top="1.501cm" fo:margin-bottom="1.901cm" fo:margin-left="2cm" fo:margin-right="1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501cm" fo:margin-left="2cm" fo:margin-right="1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  <style:master-page style:name="Преобразование_20_1" style:display-name="Преобразование 1" style:page-layout-name="Mpm2" draw:style-name="Mdp1">
      <style:header>
        <text:p text:style-name="MP1"><text:span text:style-name="Page_20_Number"><text:span text:style-name="MT1"><text:page-number text:select-page="current">22</text:page-number></text:span></text:span></text:p>
        <text:p text:style-name="MP2">Кафедра АСОИУ 09.03.04 <text:s text:c="85"/>Производственная практика-20232331<text:span text:style-name="MT2"/></text:p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 </dc:title>
    <meta:initial-creator>v</meta:initial-creator>
    <meta:creation-date>2021-01-23T11:30:00</meta:creation-date>
    <dc:date>2026-07-13T01:44:36.737261270</dc:date>
    <meta:print-date>2026-07-13T01:44:01.633171954</meta:print-date>
    <meta:editing-cycles>19</meta:editing-cycles>
    <meta:editing-duration>PT3H14M52S</meta:editing-duration>
    <meta:generator>LibreOffice/26.2.4.2$Linux_X86_64 LibreOffice_project/df4f15f06f7b375c1d16aa35fba92d50b262cd01</meta:generator>
    <meta:printed-by>Файлы PDF</meta:printed-by>
    <meta:document-statistic meta:table-count="6" meta:image-count="6" meta:object-count="0" meta:page-count="22" meta:paragraph-count="369" meta:word-count="3645" meta:character-count="31838" meta:non-whitespace-character-count="28179"/>
    <meta:template xlink:type="simple" xlink:actuate="onRequest" xlink:title="Normal" xlink:href=""/>
  </office:meta>
</office:document-meta>
</file>